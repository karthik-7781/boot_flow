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9258ADE0BAF315E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Table1" style:family="table">
      <style:table-properties style:width="5.5563in" table:align="left"/>
    </style:style>
    <style:style style:name="Table1.A" style:family="table-column">
      <style:table-column-properties style:column-width="2.1132in"/>
    </style:style>
    <style:style style:name="Table1.B" style:family="table-column">
      <style:table-column-properties style:column-width="3.4431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9465in"/>
    </style:style>
    <style:style style:name="Table2.B" style:family="table-column">
      <style:table-column-properties style:column-width="1.9556in"/>
    </style:style>
    <style:style style:name="Table2.C" style:family="table-column">
      <style:table-column-properties style:column-width="2.791in"/>
    </style:style>
    <style:style style:name="Table2.A1" style:family="table-cell">
      <style:table-cell-properties style:vertical-align="middle" fo:padding-left="0in" fo:padding-right="0in" fo:padding-top="0in" fo:padding-bottom="0.0194in" fo:border-left="none" fo:border-right="none" fo:border-top="none" fo:border-bottom="0.05pt solid #363840"/>
    </style:style>
    <style:style style:name="Table2.A4" style:family="table-cell">
      <style:table-cell-properties style:vertical-align="middle" fo:padding="0in" fo:border="none"/>
    </style:style>
    <style:style style:name="Table3" style:family="table">
      <style:table-properties style:width="6.6931in" table:align="left"/>
    </style:style>
    <style:style style:name="Table3.A" style:family="table-column">
      <style:table-column-properties style:column-width="1.7688in"/>
    </style:style>
    <style:style style:name="Table3.B" style:family="table-column">
      <style:table-column-properties style:column-width="1.3764in"/>
    </style:style>
    <style:style style:name="Table3.C" style:family="table-column">
      <style:table-column-properties style:column-width="1.2021in"/>
    </style:style>
    <style:style style:name="Table3.D" style:family="table-column">
      <style:table-column-properties style:column-width="2.3458in"/>
    </style:style>
    <style:style style:name="Table3.A1" style:family="table-cell">
      <style:table-cell-properties style:vertical-align="middle" fo:padding="0.0694in" fo:border="1pt solid #000000"/>
    </style:style>
    <style:style style:name="P1" style:family="paragraph" style:parent-style-name="Standard">
      <style:text-properties officeooo:rsid="000556cf" officeooo:paragraph-rsid="000556cf"/>
    </style:style>
    <style:style style:name="P2" style:family="paragraph" style:parent-style-name="Standard">
      <style:text-properties officeooo:rsid="0006d41a" officeooo:paragraph-rsid="0006d41a"/>
    </style:style>
    <style:style style:name="P3" style:family="paragraph" style:parent-style-name="Heading_20_1">
      <style:text-properties officeooo:rsid="0006d41a" officeooo:paragraph-rsid="0006d41a"/>
    </style:style>
    <style:style style:name="P4" style:family="paragraph" style:parent-style-name="Standard">
      <style:text-properties officeooo:rsid="0006d41a" officeooo:paragraph-rsid="0011a2f2"/>
    </style:style>
    <style:style style:name="P5" style:family="paragraph" style:parent-style-name="Text_20_body">
      <style:text-properties officeooo:rsid="0007184d" officeooo:paragraph-rsid="0007184d"/>
    </style:style>
    <style:style style:name="P6" style:family="paragraph" style:parent-style-name="Text_20_body">
      <style:paragraph-properties fo:line-height="100%"/>
      <style:text-properties officeooo:rsid="0007184d" officeooo:paragraph-rsid="0007184d"/>
    </style:style>
    <style:style style:name="P7" style:family="paragraph" style:parent-style-name="Text_20_body">
      <style:text-properties officeooo:paragraph-rsid="0007184d"/>
    </style:style>
    <style:style style:name="P8" style:family="paragraph" style:parent-style-name="Text_20_body">
      <style:paragraph-properties fo:line-height="100%"/>
      <style:text-properties officeooo:rsid="00086a49" officeooo:paragraph-rsid="00086a49"/>
    </style:style>
    <style:style style:name="P9" style:family="paragraph" style:parent-style-name="Heading_20_1">
      <style:text-properties officeooo:rsid="000fbf39" officeooo:paragraph-rsid="000fbf39"/>
    </style:style>
    <style:style style:name="P10" style:family="paragraph" style:parent-style-name="Standard">
      <style:text-properties officeooo:rsid="000fbf39" officeooo:paragraph-rsid="000fbf39"/>
    </style:style>
    <style:style style:name="P11" style:family="paragraph" style:parent-style-name="Preformatted_20_Text">
      <style:paragraph-properties fo:margin-top="0in" fo:margin-bottom="0.1965in" style:contextual-spacing="false"/>
    </style:style>
    <style:style style:name="P12" style:family="paragraph" style:parent-style-name="Preformatted_20_Text">
      <style:paragraph-properties fo:margin-top="0in" fo:margin-bottom="0.1965in" style:contextual-spacing="false" style:writing-mode="lr-tb"/>
    </style:style>
    <style:style style:name="P13" style:family="paragraph" style:parent-style-name="Standard">
      <style:text-properties officeooo:rsid="00134856" officeooo:paragraph-rsid="00134856"/>
    </style:style>
    <style:style style:name="P14" style:family="paragraph" style:parent-style-name="Standard">
      <style:text-properties officeooo:rsid="001530cc" officeooo:paragraph-rsid="001530cc"/>
    </style:style>
    <style:style style:name="P15" style:family="paragraph" style:parent-style-name="Text_20_body">
      <style:text-properties officeooo:rsid="001530cc" officeooo:paragraph-rsid="001537a4"/>
    </style:style>
    <style:style style:name="P16" style:family="paragraph" style:parent-style-name="Standard">
      <style:text-properties officeooo:paragraph-rsid="001530cc"/>
    </style:style>
    <style:style style:name="P17" style:family="paragraph" style:parent-style-name="Text_20_body">
      <style:text-properties officeooo:paragraph-rsid="001530cc"/>
    </style:style>
    <style:style style:name="P18" style:family="paragraph" style:parent-style-name="Standard">
      <style:text-properties officeooo:rsid="001909f0" officeooo:paragraph-rsid="001909f0"/>
    </style:style>
    <style:style style:name="P19" style:family="paragraph" style:parent-style-name="Standard">
      <style:text-properties officeooo:rsid="00198ab2" officeooo:paragraph-rsid="00198ab2"/>
    </style:style>
    <style:style style:name="P20" style:family="paragraph" style:parent-style-name="Standard">
      <style:text-properties officeooo:rsid="001badf8" officeooo:paragraph-rsid="001badf8"/>
    </style:style>
    <style:style style:name="P21" style:family="paragraph" style:parent-style-name="Standard">
      <style:text-properties officeooo:rsid="001d48d6" officeooo:paragraph-rsid="001d48d6"/>
    </style:style>
    <style:style style:name="P22" style:family="paragraph" style:parent-style-name="Standard">
      <style:text-properties fo:font-size="15pt" fo:font-weight="bold" officeooo:rsid="001d48d6" officeooo:paragraph-rsid="001d48d6" style:font-size-asian="15pt" style:font-weight-asian="bold" style:font-size-complex="15pt" style:font-weight-complex="bold"/>
    </style:style>
    <style:style style:name="P23" style:family="paragraph" style:parent-style-name="Standard">
      <style:text-properties fo:font-size="15pt" fo:font-weight="bold" officeooo:rsid="00207360" officeooo:paragraph-rsid="00207360" style:font-size-asian="15pt" style:font-weight-asian="bold" style:font-size-complex="15pt" style:font-weight-complex="bold"/>
    </style:style>
    <style:style style:name="P24" style:family="paragraph" style:parent-style-name="Heading_20_2">
      <style:text-properties fo:font-size="15pt" fo:font-weight="bold"/>
    </style:style>
    <style:style style:name="P25" style:family="paragraph" style:parent-style-name="Standard">
      <style:text-properties fo:font-size="12pt" fo:font-weight="normal" officeooo:rsid="00207360" officeooo:paragraph-rsid="00207360" style:font-size-asian="12pt" style:font-weight-asian="normal" style:font-size-complex="12pt" style:font-weight-complex="normal"/>
    </style:style>
    <style:style style:name="P26" style:family="paragraph" style:parent-style-name="Standard">
      <style:text-properties fo:font-size="12pt" fo:font-weight="normal" officeooo:rsid="00207360" officeooo:paragraph-rsid="00207360" style:font-size-asian="10.5pt" style:font-weight-asian="normal" style:font-size-complex="12pt" style:font-weight-complex="normal"/>
    </style:style>
    <style:style style:name="P27" style:family="paragraph" style:parent-style-name="Standard">
      <style:text-properties fo:font-size="12pt" fo:font-weight="normal" officeooo:rsid="002108b6" officeooo:paragraph-rsid="002108b6" style:font-size-asian="10.5pt" style:font-weight-asian="normal" style:font-size-complex="12pt" style:font-weight-complex="normal"/>
    </style:style>
    <style:style style:name="P28" style:family="paragraph" style:parent-style-name="Standard">
      <style:text-properties fo:font-size="12pt" fo:font-weight="normal" officeooo:rsid="0024243a" officeooo:paragraph-rsid="0024243a" style:font-size-asian="10.5pt" style:font-weight-asian="normal" style:font-size-complex="12pt" style:font-weight-complex="normal"/>
    </style:style>
    <style:style style:name="P29" style:family="paragraph" style:parent-style-name="Standard">
      <style:text-properties fo:font-size="12pt" fo:font-weight="normal" officeooo:rsid="002552ba" officeooo:paragraph-rsid="002552ba" style:font-size-asian="10.5pt" style:font-weight-asian="normal" style:font-size-complex="12pt" style:font-weight-complex="normal"/>
    </style:style>
    <style:style style:name="P30" style:family="paragraph" style:parent-style-name="Standard">
      <style:text-properties fo:font-size="12pt" fo:font-weight="normal" officeooo:rsid="0026627f" officeooo:paragraph-rsid="0026627f" style:font-size-asian="10.5pt" style:font-weight-asian="normal" style:font-size-complex="12pt" style:font-weight-complex="normal"/>
    </style:style>
    <style:style style:name="P31" style:family="paragraph" style:parent-style-name="Standard">
      <style:text-properties fo:font-size="12pt" fo:font-weight="normal" officeooo:rsid="0027fd64" officeooo:paragraph-rsid="0027fd64" style:font-size-asian="10.5pt" style:font-weight-asian="normal" style:font-size-complex="12pt" style:font-weight-complex="normal"/>
    </style:style>
    <style:style style:name="P32" style:family="paragraph" style:parent-style-name="Standard">
      <style:text-properties fo:font-size="12pt" fo:font-weight="normal" officeooo:rsid="0029beca" officeooo:paragraph-rsid="0029beca" style:font-size-asian="10.5pt" style:font-weight-asian="normal" style:font-size-complex="12pt" style:font-weight-complex="normal"/>
    </style:style>
    <style:style style:name="P33" style:family="paragraph" style:parent-style-name="Standard">
      <style:text-properties fo:font-size="12pt" fo:font-weight="normal" officeooo:rsid="002a449a" officeooo:paragraph-rsid="002a449a" style:font-size-asian="10.5pt" style:font-weight-asian="normal" style:font-size-complex="12pt" style:font-weight-complex="normal"/>
    </style:style>
    <style:style style:name="P34" style:family="paragraph" style:parent-style-name="Standard">
      <style:text-properties fo:font-size="12pt" fo:font-weight="normal" officeooo:rsid="002c5f56" officeooo:paragraph-rsid="002c5f56" style:font-size-asian="10.5pt" style:font-weight-asian="normal" style:font-size-complex="12pt" style:font-weight-complex="normal"/>
    </style:style>
    <style:style style:name="P35" style:family="paragraph" style:parent-style-name="Standard">
      <style:text-properties fo:font-size="12pt" fo:font-weight="normal" officeooo:rsid="002cad5a" officeooo:paragraph-rsid="002cad5a" style:font-size-asian="10.5pt" style:font-weight-asian="normal" style:font-size-complex="12pt" style:font-weight-complex="normal"/>
    </style:style>
    <style:style style:name="P36" style:family="paragraph" style:parent-style-name="Standard">
      <style:text-properties fo:font-size="12pt" fo:font-weight="normal" officeooo:rsid="002e9ec7" officeooo:paragraph-rsid="002e9ec7" style:font-size-asian="10.5pt" style:font-weight-asian="normal" style:font-size-complex="12pt" style:font-weight-complex="normal"/>
    </style:style>
    <style:style style:name="P37" style:family="paragraph" style:parent-style-name="Standard">
      <style:text-properties fo:font-size="12pt" fo:font-weight="normal" officeooo:rsid="003215ca" officeooo:paragraph-rsid="003215ca" style:font-size-asian="10.5pt" style:font-weight-asian="normal" style:font-size-complex="12pt" style:font-weight-complex="normal"/>
    </style:style>
    <style:style style:name="P38" style:family="paragraph" style:parent-style-name="Standard">
      <style:text-properties fo:font-size="12pt" fo:font-weight="normal" officeooo:rsid="003215ca" officeooo:paragraph-rsid="0047f1a4" style:font-size-asian="10.5pt" style:font-weight-asian="normal" style:font-size-complex="12pt" style:font-weight-complex="normal"/>
    </style:style>
    <style:style style:name="P39" style:family="paragraph" style:parent-style-name="Standard">
      <style:text-properties fo:font-size="12pt" fo:font-weight="normal" officeooo:rsid="00343497" officeooo:paragraph-rsid="00343497" style:font-size-asian="10.5pt" style:font-weight-asian="normal" style:font-size-complex="12pt" style:font-weight-complex="normal"/>
    </style:style>
    <style:style style:name="P40" style:family="paragraph" style:parent-style-name="Standard">
      <style:text-properties fo:font-size="12pt" fo:font-weight="normal" officeooo:rsid="0034cfe1" officeooo:paragraph-rsid="0034cfe1" style:font-size-asian="10.5pt" style:font-weight-asian="normal" style:font-size-complex="12pt" style:font-weight-complex="normal"/>
    </style:style>
    <style:style style:name="P41" style:family="paragraph" style:parent-style-name="Standard">
      <style:text-properties fo:font-size="12pt" fo:font-weight="normal" officeooo:rsid="0037bf7c" officeooo:paragraph-rsid="0037bf7c" style:font-size-asian="10.5pt" style:font-weight-asian="normal" style:font-size-complex="12pt" style:font-weight-complex="normal"/>
    </style:style>
    <style:style style:name="P42" style:family="paragraph" style:parent-style-name="Standard">
      <style:text-properties fo:font-size="12pt" fo:font-weight="normal" officeooo:rsid="003a98d3" officeooo:paragraph-rsid="003a98d3" style:font-size-asian="10.5pt" style:font-weight-asian="normal" style:font-size-complex="12pt" style:font-weight-complex="normal"/>
    </style:style>
    <style:style style:name="P43" style:family="paragraph" style:parent-style-name="Standard">
      <style:text-properties fo:font-size="12pt" fo:font-weight="normal" officeooo:rsid="0041df9c" officeooo:paragraph-rsid="003a98d3" style:font-size-asian="10.5pt" style:font-weight-asian="normal" style:font-size-complex="12pt" style:font-weight-complex="normal"/>
    </style:style>
    <style:style style:name="P44" style:family="paragraph" style:parent-style-name="Standard">
      <style:text-properties fo:font-size="12pt" fo:font-weight="normal" officeooo:rsid="0049c45e" officeooo:paragraph-rsid="0049c45e" style:font-size-asian="10.5pt" style:font-weight-asian="normal" style:font-size-complex="12pt" style:font-weight-complex="normal"/>
    </style:style>
    <style:style style:name="P45" style:family="paragraph" style:parent-style-name="Standard">
      <style:text-properties fo:font-size="12pt" fo:font-weight="normal" officeooo:rsid="005204cb" officeooo:paragraph-rsid="005204cb" style:font-size-asian="10.5pt" style:font-weight-asian="normal" style:font-size-complex="12pt" style:font-weight-complex="normal"/>
    </style:style>
    <style:style style:name="P46" style:family="paragraph" style:parent-style-name="Text_20_body">
      <style:text-properties fo:font-size="12pt" fo:font-weight="normal" officeooo:rsid="005204cb" officeooo:paragraph-rsid="005204cb" style:font-size-asian="10.5pt" style:font-weight-asian="normal" style:font-size-complex="12pt" style:font-weight-complex="normal"/>
    </style:style>
    <style:style style:name="P47" style:family="paragraph" style:parent-style-name="Standard">
      <style:text-properties fo:font-size="12pt" fo:font-weight="normal" officeooo:rsid="0053f745" officeooo:paragraph-rsid="0053f745" style:font-size-asian="10.5pt" style:font-weight-asian="normal" style:font-size-complex="12pt" style:font-weight-complex="normal"/>
    </style:style>
    <style:style style:name="P48" style:family="paragraph" style:parent-style-name="Text_20_body">
      <style:paragraph-properties fo:margin-left="0in" fo:margin-right="0in" fo:margin-top="0.1252in" fo:margin-bottom="0.1665in" style:contextual-spacing="false" fo:text-indent="0in" style:auto-text-indent="false" fo:padding="0in" fo:border="none"/>
      <style:text-properties fo:font-size="12pt" fo:font-weight="normal" officeooo:rsid="0053f745" style:font-size-asian="10.5pt" style:font-weight-asian="normal" style:font-size-complex="12pt" style:font-weight-complex="normal"/>
    </style:style>
    <style:style style:name="P49" style:family="paragraph" style:parent-style-name="Standard">
      <style:paragraph-properties fo:margin-left="0in" fo:margin-right="0in" fo:margin-top="0.1252in" fo:margin-bottom="0.1665in" style:contextual-spacing="false" fo:text-indent="0in" style:auto-text-indent="false"/>
      <style:text-properties fo:font-size="12pt" fo:font-weight="normal"/>
    </style:style>
    <style:style style:name="P50" style:family="paragraph" style:parent-style-name="Standard">
      <style:text-properties fo:font-size="12pt" fo:font-weight="bold" officeooo:rsid="0027fd64" officeooo:paragraph-rsid="0027fd64" style:font-size-asian="10.5pt" style:font-weight-asian="bold" style:font-size-complex="12pt" style:font-weight-complex="bold"/>
    </style:style>
    <style:style style:name="P51" style:family="paragraph" style:parent-style-name="Text_20_body">
      <style:paragraph-properties fo:line-height="100%"/>
      <style:text-properties officeooo:rsid="0011a2f2" officeooo:paragraph-rsid="0011a2f2"/>
    </style:style>
    <style:style style:name="P52" style:family="paragraph" style:parent-style-name="Text_20_body">
      <style:text-properties officeooo:paragraph-rsid="00128916"/>
    </style:style>
    <style:style style:name="P53" style:family="paragraph" style:parent-style-name="Text_20_body">
      <style:text-properties officeooo:rsid="00128916" officeooo:paragraph-rsid="00128916"/>
    </style:style>
    <style:style style:name="P54" style:family="paragraph" style:parent-style-name="Text_20_body">
      <style:text-properties officeooo:paragraph-rsid="001537a4"/>
    </style:style>
    <style:style style:name="P55" style:family="paragraph" style:parent-style-name="Preformatted_20_Text">
      <style:paragraph-properties fo:margin-left="0in" fo:margin-right="0in" fo:margin-top="0in" fo:margin-bottom="0in" style:contextual-spacing="false" fo:text-indent="0in" style:auto-text-indent="false" fo:padding="0in" fo:border="none" style:writing-mode="lr-tb"/>
    </style:style>
    <style:style style:name="P56" style:family="paragraph" style:parent-style-name="Standard">
      <style:paragraph-properties fo:margin-left="0in" fo:margin-right="0in" fo:margin-top="0in" fo:margin-bottom="0in" style:contextual-spacing="false" fo:text-indent="0in" style:auto-text-indent="false"/>
    </style:style>
    <style:style style:name="P57" style:family="paragraph" style:parent-style-name="Standard">
      <style:paragraph-properties fo:margin-left="0in" fo:margin-right="0in" fo:margin-top="0in" fo:margin-bottom="0in" style:contextual-spacing="false" fo:text-indent="0in" style:auto-text-indent="false" style:writing-mode="lr-tb"/>
    </style:style>
    <style:style style:name="P58" style:family="paragraph" style:parent-style-name="Table_20_Contents">
      <style:paragraph-properties fo:margin-left="0in" fo:margin-right="0in" fo:margin-top="0in" fo:margin-bottom="0in" style:contextual-spacing="false" fo:text-indent="0in" style:auto-text-indent="false" style:writing-mode="lr-tb"/>
    </style:style>
    <style:style style:name="P59" style:family="paragraph" style:parent-style-name="Text_20_body">
      <style:paragraph-properties fo:margin-left="0in" fo:margin-right="0in" fo:margin-top="0in" fo:margin-bottom="0in" style:contextual-spacing="false" fo:text-indent="0in" style:auto-text-indent="false" style:writing-mode="lr-tb"/>
    </style:style>
    <style:style style:name="P60" style:family="paragraph" style:parent-style-name="Table_20_Contents">
      <style:paragraph-properties fo:margin-left="0in" fo:margin-right="0in" fo:margin-top="0in" fo:margin-bottom="0in" style:contextual-spacing="false" fo:text-indent="0in" style:auto-text-indent="false"/>
    </style:style>
    <style:style style:name="P61" style:family="paragraph" style:parent-style-name="Text_20_body">
      <style:paragraph-properties fo:margin-left="0in" fo:margin-right="0in" fo:margin-top="0in" fo:margin-bottom="0in" style:contextual-spacing="false" fo:text-indent="0in" style:auto-text-indent="false"/>
    </style:style>
    <style:style style:name="P62" style:family="paragraph" style:parent-style-name="Standard">
      <style:paragraph-properties fo:margin-left="0in" fo:margin-right="0in" fo:margin-top="0in" fo:margin-bottom="0.1965in" style:contextual-spacing="false" fo:text-indent="0in" style:auto-text-indent="false"/>
    </style:style>
    <style:style style:name="P63" style:family="paragraph" style:parent-style-name="Standard">
      <style:paragraph-properties fo:margin-left="0in" fo:margin-right="0in" fo:margin-top="0in" fo:margin-bottom="0.1965in" style:contextual-spacing="false" fo:text-indent="0in" style:auto-text-indent="false" style:writing-mode="lr-tb"/>
    </style:style>
    <style:style style:name="P64" style:family="paragraph" style:parent-style-name="Text_20_body">
      <style:paragraph-properties fo:margin-left="0in" fo:margin-right="0in" fo:margin-top="0.1252in" fo:margin-bottom="0.1665in" style:contextual-spacing="false" fo:text-indent="0in" style:auto-text-indent="false" fo:padding="0in" fo:border="none"/>
    </style:style>
    <style:style style:name="P65" style:family="paragraph" style:parent-style-name="Preformatted_20_Text">
      <style:paragraph-properties fo:margin-top="0in" fo:margin-bottom="0in" style:contextual-spacing="false" fo:padding="0in" fo:border="none" style:writing-mode="lr-tb"/>
    </style:style>
    <style:style style:name="P66" style:family="paragraph" style:parent-style-name="Text_20_body">
      <style:paragraph-properties fo:margin-top="0in" fo:margin-bottom="0in" style:contextual-spacing="false"/>
    </style:style>
    <style:style style:name="P67" style:family="paragraph" style:parent-style-name="Standard">
      <style:paragraph-properties fo:margin-left="0in" fo:margin-right="0in" fo:margin-top="0.25in" fo:margin-bottom="0.1252in" style:contextual-spacing="false" fo:text-indent="0in" style:auto-text-indent="false"/>
      <style:text-properties style:text-line-through-style="none" style:text-line-through-type="none" style:font-name="Google Sans" fo:font-size="15pt" style:text-underline-style="none" fo:font-weight="bold" style:text-blinking="false" loext:padding="0in" loext:border="none"/>
    </style:style>
    <style:style style:name="P68" style:family="paragraph" style:parent-style-name="Text_20_body">
      <style:paragraph-properties fo:margin-left="0in" fo:margin-right="0in" fo:margin-top="0.25in" fo:margin-bottom="0.1252in" style:contextual-spacing="false" fo:text-indent="0in" style:auto-text-indent="false"/>
      <style:text-properties style:text-line-through-style="none" style:text-line-through-type="none" style:font-name="Google Sans" fo:font-size="15pt" style:text-underline-style="none" fo:font-weight="bold" style:text-blinking="false" loext:padding="0in" loext:border="none"/>
    </style:style>
    <style:style style:name="P69" style:family="paragraph" style:parent-style-name="Standard">
      <style:text-properties style:text-line-through-style="none" style:text-line-through-type="none" style:font-name="Google Sans" fo:font-size="15pt" style:text-underline-style="none" fo:font-weight="bold" officeooo:rsid="0049c45e" officeooo:paragraph-rsid="0049c45e" style:text-blinking="false" style:font-size-asian="10.5pt" style:font-weight-asian="normal" style:font-size-complex="12pt" style:font-weight-complex="normal" loext:padding="0in" loext:border="none"/>
    </style:style>
    <style:style style:name="P70" style:family="paragraph" style:parent-style-name="Standard">
      <style:text-properties style:text-line-through-style="none" style:text-line-through-type="none" style:font-name="Google Sans" fo:font-size="15pt" style:text-underline-style="none" fo:font-weight="bold" officeooo:rsid="004e1a83" officeooo:paragraph-rsid="004e1a83" style:text-blinking="false" style:font-size-asian="10.5pt" style:font-weight-asian="normal" style:font-size-complex="12pt" style:font-weight-complex="normal" loext:padding="0in" loext:border="none"/>
    </style:style>
    <style:style style:name="P71" style:family="paragraph" style:parent-style-name="Standard">
      <style:text-properties style:text-line-through-style="none" style:text-line-through-type="none" style:font-name="Google Sans" fo:font-size="15pt" style:text-underline-style="none" fo:font-weight="bold" officeooo:rsid="005204cb" officeooo:paragraph-rsid="005204cb" style:text-blinking="false" style:font-size-asian="10.5pt" style:font-weight-asian="normal" style:font-size-complex="12pt" style:font-weight-complex="normal" loext:padding="0in" loext:border="none"/>
    </style:style>
    <style:style style:name="P72" style:family="paragraph" style:parent-style-name="Standard">
      <style:paragraph-properties fo:margin-left="0in" fo:margin-right="0in" fo:margin-top="0.1252in" fo:margin-bottom="0.1665in" style:contextual-spacing="false" fo:text-indent="0in" style:auto-text-indent="false" fo:padding="0in" fo:border="none"/>
      <style:text-properties style:text-line-through-style="none" style:text-line-through-type="none" style:font-name="Google Sans" fo:font-size="15pt" style:text-underline-style="none" fo:font-weight="bold" officeooo:rsid="0053f745" style:text-blinking="false" style:font-size-asian="10.5pt" style:font-weight-asian="normal" style:font-size-complex="12pt" style:font-weight-complex="normal" loext:padding="0in" loext:border="none"/>
    </style:style>
    <style:style style:name="P73" style:family="paragraph" style:parent-style-name="Standard">
      <style:paragraph-properties fo:margin-left="0in" fo:margin-right="0in" fo:margin-top="0.1252in" fo:margin-bottom="0.1665in" style:contextual-spacing="false" fo:text-indent="0in" style:auto-text-indent="false"/>
      <style:text-properties style:text-line-through-style="none" style:text-line-through-type="none" style:font-name="Google Sans" fo:font-size="12pt" style:text-underline-style="none" fo:font-weight="normal" style:text-blinking="false" loext:padding="0in" loext:border="none"/>
    </style:style>
    <style:style style:name="P74" style:family="paragraph" style:parent-style-name="Text_20_body">
      <style:paragraph-properties fo:margin-left="0in" fo:margin-right="0in" fo:margin-top="0.1252in" fo:margin-bottom="0.1665in" style:contextual-spacing="false" fo:text-indent="0in" style:auto-text-indent="false"/>
      <style:text-properties style:text-line-through-style="none" style:text-line-through-type="none" style:font-name="Google Sans" fo:font-size="12pt" style:text-underline-style="none" fo:font-weight="normal" style:text-blinking="false" loext:padding="0in" loext:border="none"/>
    </style:style>
    <style:style style:name="P75" style:family="paragraph" style:parent-style-name="Standard">
      <style:paragraph-properties fo:margin-left="0in" fo:margin-right="0in" fo:margin-top="0in" fo:margin-bottom="0in" style:contextual-spacing="false" fo:text-indent="0in" style:auto-text-indent="false"/>
      <style:text-properties style:text-line-through-style="none" style:text-line-through-type="none" style:font-name="Google Sans" fo:font-size="12pt" style:text-underline-style="none" fo:font-weight="normal" style:text-blinking="false" loext:padding="0in" loext:border="none"/>
    </style:style>
    <style:style style:name="P76" style:family="paragraph" style:parent-style-name="Standard">
      <style:paragraph-properties fo:margin-left="0in" fo:margin-right="0in" fo:margin-top="0in" fo:margin-bottom="0in" style:contextual-spacing="false" fo:text-indent="0in" style:auto-text-indent="false" fo:padding="0in" fo:border="none" style:writing-mode="lr-tb"/>
      <style:text-properties style:text-line-through-style="none" style:text-line-through-type="none" style:font-name="Google Sans" fo:font-size="12pt" style:text-underline-style="none" fo:font-weight="normal" style:text-blinking="false" loext:padding="0in" loext:border="none"/>
    </style:style>
    <style:style style:name="P77" style:family="paragraph" style:parent-style-name="Text_20_body">
      <style:paragraph-properties fo:margin-left="0in" fo:margin-right="0in" fo:margin-top="0in" fo:margin-bottom="0in" style:contextual-spacing="false" fo:text-indent="0in" style:auto-text-indent="false" fo:padding="0in" fo:border="none" style:writing-mode="lr-tb"/>
      <style:text-properties style:text-line-through-style="none" style:text-line-through-type="none" style:font-name="Google Sans" fo:font-size="12pt" style:text-underline-style="none" fo:font-weight="normal" style:text-blinking="false" loext:padding="0in" loext:border="none"/>
    </style:style>
    <style:style style:name="P78" style:family="paragraph" style:parent-style-name="Standard">
      <style:text-properties style:text-line-through-style="none" style:text-line-through-type="none" style:font-name="Google Sans" fo:font-size="12pt" style:text-underline-style="none" fo:font-weight="normal" officeooo:rsid="0049c45e" officeooo:paragraph-rsid="0049c45e" style:text-blinking="false" style:font-size-asian="10.5pt" style:font-weight-asian="normal" style:font-size-complex="12pt" style:font-weight-complex="normal" loext:padding="0in" loext:border="none"/>
    </style:style>
    <style:style style:name="P79" style:family="paragraph" style:parent-style-name="Standard">
      <style:text-properties style:text-line-through-style="none" style:text-line-through-type="none" style:font-name="Google Sans" fo:font-size="12pt" style:text-underline-style="none" fo:font-weight="normal" officeooo:rsid="005204cb" officeooo:paragraph-rsid="005204cb" style:text-blinking="false" style:font-size-asian="10.5pt" style:font-weight-asian="normal" style:font-size-complex="12pt" style:font-weight-complex="normal" loext:padding="0in" loext:border="none"/>
    </style:style>
    <style:style style:name="P80" style:family="paragraph" style:parent-style-name="Standard">
      <style:paragraph-properties fo:margin-left="0in" fo:margin-right="0in" fo:margin-top="0.1252in" fo:margin-bottom="0.1665in" style:contextual-spacing="false" fo:text-indent="0in" style:auto-text-indent="false"/>
      <style:text-properties style:text-line-through-style="none" style:text-line-through-type="none" style:font-name="Google Sans" fo:font-size="12pt" style:text-underline-style="none" fo:font-weight="normal" officeooo:rsid="0053f745" style:text-blinking="false" style:font-size-asian="10.5pt" style:font-weight-asian="normal" style:font-size-complex="12pt" style:font-weight-complex="normal" loext:padding="0in" loext:border="none"/>
    </style:style>
    <style:style style:name="P81" style:family="paragraph" style:parent-style-name="Standard">
      <style:paragraph-properties fo:margin-left="0in" fo:margin-right="0in" fo:margin-top="0.25in" fo:margin-bottom="0.1252in" style:contextual-spacing="false" fo:text-indent="0in" style:auto-text-indent="false"/>
      <style:text-properties style:text-line-through-style="none" style:text-line-through-type="none" style:font-name="Google Sans" fo:font-size="12pt" style:text-underline-style="none" fo:font-weight="bold" style:text-blinking="false" loext:padding="0in" loext:border="none"/>
    </style:style>
    <style:style style:name="P82" style:family="paragraph" style:parent-style-name="Text_20_body">
      <style:paragraph-properties fo:margin-left="0in" fo:margin-right="0in" fo:margin-top="0.25in" fo:margin-bottom="0.1252in" style:contextual-spacing="false" fo:text-indent="0in" style:auto-text-indent="false"/>
      <style:text-properties style:text-line-through-style="none" style:text-line-through-type="none" style:font-name="Google Sans" fo:font-size="12pt" style:text-underline-style="none" fo:font-weight="bold" style:text-blinking="false" loext:padding="0in" loext:border="none"/>
    </style:style>
    <style:style style:name="P83" style:family="paragraph" style:parent-style-name="Standard">
      <style:paragraph-properties fo:margin-left="0in" fo:margin-right="0in" fo:margin-top="0.1252in" fo:margin-bottom="0.1665in" style:contextual-spacing="false" fo:text-indent="0in" style:auto-text-indent="false" fo:padding="0in" fo:border="none"/>
      <style:text-properties style:text-line-through-style="none" style:text-line-through-type="none" style:font-name="Google Sans" fo:font-size="12pt" style:text-underline-style="none" fo:font-weight="bold" officeooo:rsid="0053f745" style:text-blinking="false" style:font-size-asian="10.5pt" style:font-weight-asian="normal" style:font-size-complex="12pt" style:font-weight-complex="normal" loext:padding="0in" loext:border="none"/>
    </style:style>
    <style:style style:name="P84" style:family="paragraph" style:parent-style-name="Table_20_Contents">
      <style:paragraph-properties fo:margin-top="0in" fo:margin-bottom="0in" style:contextual-spacing="false"/>
      <style:text-properties style:text-line-through-style="none" style:text-line-through-type="none" style:font-name="Google Sans" fo:font-size="10.5pt" style:text-underline-style="none" fo:font-weight="normal" style:text-blinking="false"/>
    </style:style>
    <style:style style:name="P85" style:family="paragraph" style:parent-style-name="Table_20_Contents">
      <style:paragraph-properties fo:margin-left="0in" fo:margin-right="0in" fo:margin-top="0in" fo:margin-bottom="0in" style:contextual-spacing="false" fo:text-indent="0in" style:auto-text-indent="false"/>
      <style:text-properties style:text-line-through-style="none" style:text-line-through-type="none" style:font-name="Google Sans" fo:font-size="10.5pt" style:text-underline-style="none" fo:font-weight="normal" style:text-blinking="false"/>
    </style:style>
    <style:style style:name="P86" style:family="paragraph" style:parent-style-name="Table_20_Heading">
      <style:paragraph-properties fo:margin-left="0in" fo:margin-right="0in" fo:margin-top="0in" fo:margin-bottom="0in" style:contextual-spacing="false" fo:text-indent="0in" style:auto-text-indent="false"/>
      <style:text-properties style:text-line-through-style="none" style:text-line-through-type="none" style:font-name="Google Sans" fo:font-size="10.5pt" style:text-underline-style="none" fo:font-weight="bold" style:text-blinking="false"/>
    </style:style>
    <style:style style:name="P87" style:family="paragraph" style:parent-style-name="Preformatted_20_Text">
      <style:paragraph-properties fo:margin-top="0in" fo:margin-bottom="0.1965in" style:contextual-spacing="false" style:writing-mode="lr-tb"/>
      <style:text-properties fo:color="#c5221f" loext:opacity="100%"/>
    </style:style>
    <style:style style:name="P88" style:family="paragraph" style:parent-style-name="Preformatted_20_Text">
      <style:paragraph-properties style:writing-mode="lr-tb"/>
      <style:text-properties fo:color="#c5221f" loext:opacity="100%"/>
    </style:style>
    <style:style style:name="P89" style:family="paragraph" style:parent-style-name="Preformatted_20_Text">
      <style:paragraph-properties style:writing-mode="lr-tb"/>
    </style:style>
    <style:style style:name="P90" style:family="paragraph" style:parent-style-name="Table_20_Contents">
      <style:paragraph-properties fo:text-align="start" style:justify-single-word="false"/>
    </style:style>
    <style:style style:name="P91" style:family="paragraph" style:parent-style-name="Table_20_Contents">
      <style:paragraph-properties fo:text-align="start" style:justify-single-word="false" style:writing-mode="lr-tb"/>
    </style:style>
    <style:style style:name="P92" style:family="paragraph" style:parent-style-name="Table_20_Heading">
      <style:paragraph-properties fo:text-align="start" style:justify-single-word="false"/>
    </style:style>
    <style:style style:name="P93" style:family="paragraph" style:parent-style-name="Text_20_body">
      <style:paragraph-properties fo:margin-left="0.1665in" fo:margin-right="0.1665in" fo:margin-top="0.1665in" fo:margin-bottom="0.1665in" style:contextual-spacing="false" fo:text-indent="0in" style:auto-text-indent="false" style:writing-mode="lr-tb"/>
    </style:style>
    <style:style style:name="P94" style:family="paragraph" style:parent-style-name="Text_20_body">
      <style:paragraph-properties fo:margin-left="0.1665in" fo:margin-right="0.1665in" fo:margin-top="0.1665in" fo:margin-bottom="0.1665in" style:contextual-spacing="false" fo:text-indent="0in" style:auto-text-indent="false"/>
    </style:style>
    <style:style style:name="P95" style:family="paragraph" style:parent-style-name="Text_20_body">
      <style:paragraph-properties fo:margin-left="0.1665in" fo:margin-right="0.1665in" fo:margin-top="0.1665in" fo:margin-bottom="0.1665in" style:contextual-spacing="false" fo:text-indent="0in" style:auto-text-indent="false"/>
      <style:text-properties fo:font-weight="normal"/>
    </style:style>
    <style:style style:name="P96" style:family="paragraph" style:parent-style-name="Standard">
      <style:text-properties fo:font-size="12pt" fo:font-weight="normal" officeooo:rsid="003215ca" officeooo:paragraph-rsid="0047f1a4" style:font-size-asian="10.5pt" style:font-weight-asian="normal" style:font-size-complex="12pt" style:font-weight-complex="normal"/>
    </style:style>
    <style:style style:name="P97" style:family="paragraph" style:parent-style-name="Standard">
      <style:text-properties fo:font-size="12pt" fo:font-weight="normal" officeooo:rsid="005e6e07" officeooo:paragraph-rsid="005e6e07" style:font-size-asian="10.5pt" style:font-weight-asian="normal" style:font-size-complex="12pt" style:font-weight-complex="normal"/>
    </style:style>
    <style:style style:name="P98" style:family="paragraph" style:parent-style-name="Standard">
      <style:text-properties fo:font-size="12pt" fo:font-weight="normal" officeooo:rsid="0049c45e" officeooo:paragraph-rsid="005e6e07" style:font-size-asian="10.5pt" style:font-weight-asian="normal" style:font-size-complex="12pt" style:font-weight-complex="normal"/>
    </style:style>
    <style:style style:name="P99" style:family="paragraph" style:parent-style-name="Standard">
      <style:text-properties fo:font-size="12pt" fo:font-weight="bold" officeooo:rsid="005e6e07" officeooo:paragraph-rsid="005e6e07" style:font-size-asian="10.5pt" style:font-weight-asian="bold" style:font-size-complex="12pt" style:font-weight-complex="bold"/>
    </style:style>
    <style:style style:name="P100" style:family="paragraph" style:parent-style-name="Text_20_body" style:list-style-name="L1"/>
    <style:style style:name="P101" style:family="paragraph" style:parent-style-name="Text_20_body" style:list-style-name="L1">
      <style:paragraph-properties fo:margin-top="0in" fo:margin-bottom="0in" style:contextual-spacing="false"/>
    </style:style>
    <style:style style:name="P102" style:family="paragraph" style:parent-style-name="Text_20_body" style:list-style-name="L2">
      <style:paragraph-properties fo:line-height="100%"/>
      <style:text-properties officeooo:rsid="000a3229" officeooo:paragraph-rsid="000a3229"/>
    </style:style>
    <style:style style:name="P103" style:family="paragraph" style:parent-style-name="Text_20_body" style:list-style-name="L3">
      <style:paragraph-properties fo:line-height="100%"/>
      <style:text-properties officeooo:rsid="00086a49" officeooo:paragraph-rsid="00086a49"/>
    </style:style>
    <style:style style:name="P104" style:family="paragraph" style:parent-style-name="Text_20_body" style:list-style-name="L3">
      <style:paragraph-properties fo:line-height="100%"/>
      <style:text-properties officeooo:rsid="00088b24" officeooo:paragraph-rsid="00088b24"/>
    </style:style>
    <style:style style:name="P105" style:family="paragraph" style:parent-style-name="Text_20_body" style:list-style-name="L3">
      <style:paragraph-properties fo:line-height="100%"/>
      <style:text-properties officeooo:rsid="000d135a" officeooo:paragraph-rsid="000d135a"/>
    </style:style>
    <style:style style:name="P106" style:family="paragraph" style:parent-style-name="Text_20_body" style:list-style-name="L3">
      <style:paragraph-properties fo:line-height="100%"/>
      <style:text-properties officeooo:rsid="000de004" officeooo:paragraph-rsid="000de004"/>
    </style:style>
    <style:style style:name="P107" style:family="paragraph" style:parent-style-name="Text_20_body" style:list-style-name="L3">
      <style:paragraph-properties fo:line-height="100%"/>
      <style:text-properties officeooo:rsid="000d5b92" officeooo:paragraph-rsid="000d5b92"/>
    </style:style>
    <style:style style:name="P108"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109" style:family="paragraph" style:parent-style-name="Text_20_body" style:list-style-name="L4">
      <style:paragraph-properties fo:margin-left="0in" fo:margin-right="0in" fo:margin-top="0in" fo:margin-bottom="0in" style:contextual-spacing="false" fo:text-indent="0in" style:auto-text-indent="false" fo:padding="0in" fo:border="none" style:writing-mode="lr-tb"/>
    </style:style>
    <style:style style:name="P110" style:family="paragraph" style:parent-style-name="Text_20_body" style:list-style-name="L5">
      <style:paragraph-properties fo:margin-left="0in" fo:margin-right="0in" fo:margin-top="0in" fo:margin-bottom="0in" style:contextual-spacing="false" fo:text-indent="0in" style:auto-text-indent="false" fo:padding="0in" fo:border="none" style:writing-mode="lr-tb"/>
    </style:style>
    <style:style style:name="P111"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112" style:family="paragraph" style:parent-style-name="Text_20_body" style:list-style-name="L6">
      <style:paragraph-properties fo:margin-left="0in" fo:margin-right="0in" fo:margin-top="0in" fo:margin-bottom="0in" style:contextual-spacing="false" fo:text-indent="0in" style:auto-text-indent="false" fo:padding="0in" fo:border="none" style:writing-mode="lr-tb"/>
    </style:style>
    <style:style style:name="P113" style:family="paragraph" style:parent-style-name="Text_20_body" style:list-style-name="L6">
      <style:paragraph-properties fo:margin-left="0in" fo:margin-right="0in" fo:margin-top="0in" fo:margin-bottom="0in" style:contextual-spacing="false" fo:text-indent="0in" style:auto-text-indent="false" fo:padding="0in" fo:border="none"/>
    </style:style>
    <style:style style:name="P114" style:family="paragraph" style:parent-style-name="Text_20_body" style:list-style-name="L7">
      <style:paragraph-properties fo:margin-left="0in" fo:margin-right="0in" fo:margin-top="0in" fo:margin-bottom="0in" style:contextual-spacing="false" fo:text-indent="0in" style:auto-text-indent="false" fo:padding="0in" fo:border="none" style:writing-mode="lr-tb"/>
    </style:style>
    <style:style style:name="P115" style:family="paragraph" style:parent-style-name="Text_20_body" style:list-style-name="L8">
      <style:paragraph-properties fo:margin-left="0in" fo:margin-right="0in" fo:margin-top="0in" fo:margin-bottom="0in" style:contextual-spacing="false" fo:text-indent="0in" style:auto-text-indent="false" fo:padding="0in" fo:border="none" style:writing-mode="lr-tb"/>
    </style:style>
    <style:style style:name="P116" style:family="paragraph" style:parent-style-name="Text_20_body" style:list-style-name="L8">
      <style:paragraph-properties fo:margin-left="0in" fo:margin-right="0in" fo:margin-top="0.1252in" fo:margin-bottom="0.1665in" style:contextual-spacing="false" fo:text-indent="0in" style:auto-text-indent="false" fo:padding="0in" fo:border="none"/>
    </style:style>
    <style:style style:name="P117" style:family="paragraph" style:parent-style-name="Text_20_body" style:list-style-name="L9">
      <style:paragraph-properties fo:margin-left="0in" fo:margin-right="0in" fo:margin-top="0in" fo:margin-bottom="0in" style:contextual-spacing="false" fo:text-indent="0in" style:auto-text-indent="false" fo:padding="0in" fo:border="none" style:writing-mode="lr-tb"/>
    </style:style>
    <style:style style:name="P118" style:family="paragraph" style:parent-style-name="Text_20_body" style:list-style-name="L9">
      <style:paragraph-properties fo:margin-left="0in" fo:margin-right="0in" fo:margin-top="0in" fo:margin-bottom="0in" style:contextual-spacing="false" fo:text-indent="0in" style:auto-text-indent="false" fo:padding="0in" fo:border="none"/>
      <style:text-properties style:text-line-through-style="none" style:text-line-through-type="none" style:font-name="Google Sans" fo:font-size="12pt" style:text-underline-style="none" fo:font-weight="normal" style:text-blinking="false" loext:padding="0in" loext:border="none"/>
    </style:style>
    <style:style style:name="P119" style:family="paragraph" style:parent-style-name="Text_20_body" style:list-style-name="L10">
      <style:paragraph-properties fo:margin-left="0in" fo:margin-right="0in" fo:margin-top="0in" fo:margin-bottom="0in" style:contextual-spacing="false" fo:text-indent="0in" style:auto-text-indent="false" fo:padding="0in" fo:border="none"/>
      <style:text-properties style:text-line-through-style="none" style:text-line-through-type="none" style:font-name="Google Sans" fo:font-size="12pt" style:text-underline-style="none" fo:font-weight="normal" style:text-blinking="false" loext:padding="0in" loext:border="none"/>
    </style:style>
    <style:style style:name="P120" style:family="paragraph" style:parent-style-name="Text_20_body" style:list-style-name="L12">
      <style:paragraph-properties fo:margin-left="0in" fo:margin-right="0in" fo:margin-top="0in" fo:margin-bottom="0in" style:contextual-spacing="false" fo:text-indent="0in" style:auto-text-indent="false" fo:padding="0in" fo:border="none"/>
      <style:text-properties style:text-line-through-style="none" style:text-line-through-type="none" style:font-name="Google Sans" fo:font-size="12pt" style:text-underline-style="none" fo:font-weight="normal" style:text-blinking="false" loext:padding="0in" loext:border="none"/>
    </style:style>
    <style:style style:name="P121" style:family="paragraph" style:parent-style-name="Text_20_body" style:list-style-name="L13">
      <style:paragraph-properties fo:margin-left="0in" fo:margin-right="0in" fo:margin-top="0in" fo:margin-bottom="0in" style:contextual-spacing="false" fo:text-indent="0in" style:auto-text-indent="false" fo:padding="0in" fo:border="none"/>
      <style:text-properties style:text-line-through-style="none" style:text-line-through-type="none" style:font-name="Google Sans" fo:font-size="12pt" style:text-underline-style="none" fo:font-weight="normal" style:text-blinking="false" loext:padding="0in" loext:border="none"/>
    </style:style>
    <style:style style:name="P122" style:family="paragraph" style:parent-style-name="Text_20_body" style:list-style-name="L10">
      <style:paragraph-properties fo:margin-left="0in" fo:margin-right="0in" fo:margin-top="0in" fo:margin-bottom="0in" style:contextual-spacing="false" fo:text-indent="0in" style:auto-text-indent="false" fo:padding="0in" fo:border="none" style:writing-mode="lr-tb"/>
    </style:style>
    <style:style style:name="P123" style:family="paragraph" style:parent-style-name="Text_20_body" style:list-style-name="L11">
      <style:paragraph-properties fo:margin-left="0in" fo:margin-right="0in" fo:margin-top="0in" fo:margin-bottom="0in" style:contextual-spacing="false" fo:text-indent="0in" style:auto-text-indent="false" fo:padding="0in" fo:border="none" style:writing-mode="lr-tb"/>
    </style:style>
    <style:style style:name="P124" style:family="paragraph" style:parent-style-name="Text_20_body" style:list-style-name="L12">
      <style:paragraph-properties fo:margin-left="0in" fo:margin-right="0in" fo:margin-top="0in" fo:margin-bottom="0in" style:contextual-spacing="false" fo:text-indent="0in" style:auto-text-indent="false" fo:padding="0in" fo:border="none" style:writing-mode="lr-tb"/>
    </style:style>
    <style:style style:name="P125" style:family="paragraph" style:parent-style-name="Text_20_body" style:list-style-name="L13">
      <style:paragraph-properties fo:margin-left="0in" fo:margin-right="0in" fo:margin-top="0in" fo:margin-bottom="0in" style:contextual-spacing="false" fo:text-indent="0in" style:auto-text-indent="false" fo:padding="0in" fo:border="none" style:writing-mode="lr-tb"/>
    </style:style>
    <style:style style:name="P126" style:family="paragraph" style:parent-style-name="Text_20_body" style:list-style-name="L14">
      <style:paragraph-properties fo:margin-top="0in" fo:margin-bottom="0in" style:contextual-spacing="false"/>
    </style:style>
    <style:style style:name="P127" style:family="paragraph" style:parent-style-name="Text_20_body" style:list-style-name="L14">
      <style:paragraph-properties fo:margin-top="0in" fo:margin-bottom="0in" style:contextual-spacing="false" style:writing-mode="lr-tb"/>
    </style:style>
    <style:style style:name="P128" style:family="paragraph" style:parent-style-name="Text_20_body" style:list-style-name="L14">
      <style:paragraph-properties style:writing-mode="lr-tb"/>
    </style:style>
    <style:style style:name="P129" style:family="paragraph" style:parent-style-name="Text_20_body" style:list-style-name="L15">
      <style:paragraph-properties fo:margin-top="0in" fo:margin-bottom="0in" style:contextual-spacing="false" style:writing-mode="lr-tb"/>
    </style:style>
    <style:style style:name="P130" style:family="paragraph" style:parent-style-name="Text_20_body" style:list-style-name="L15">
      <style:paragraph-properties fo:margin-top="0in" fo:margin-bottom="0in" style:contextual-spacing="false"/>
    </style:style>
    <style:style style:name="P131" style:family="paragraph" style:parent-style-name="Text_20_body" style:list-style-name="L15">
      <style:paragraph-properties style:writing-mode="lr-tb"/>
    </style:style>
    <style:style style:name="P132" style:family="paragraph" style:parent-style-name="Text_20_body" style:list-style-name="L16">
      <style:paragraph-properties fo:margin-top="0in" fo:margin-bottom="0in" style:contextual-spacing="false" style:writing-mode="lr-tb"/>
    </style:style>
    <style:style style:name="P133" style:family="paragraph" style:parent-style-name="Text_20_body" style:list-style-name="L16">
      <style:paragraph-properties style:writing-mode="lr-tb"/>
    </style:style>
    <style:style style:name="P134" style:family="paragraph" style:parent-style-name="Text_20_body" style:list-style-name="L17">
      <style:paragraph-properties fo:margin-top="0in" fo:margin-bottom="0in" style:contextual-spacing="false" style:writing-mode="lr-tb"/>
    </style:style>
    <style:style style:name="P135" style:family="paragraph" style:parent-style-name="Text_20_body" style:list-style-name="L17">
      <style:paragraph-properties style:writing-mode="lr-tb"/>
    </style:style>
    <style:style style:name="P136" style:family="paragraph" style:parent-style-name="Text_20_body" style:list-style-name="L18"/>
    <style:style style:name="P137" style:family="paragraph" style:parent-style-name="Text_20_body" style:list-style-name="L18">
      <style:paragraph-properties fo:margin-top="0in" fo:margin-bottom="0in" style:contextual-spacing="false" style:writing-mode="lr-tb"/>
    </style:style>
    <style:style style:name="P138" style:family="paragraph" style:parent-style-name="Text_20_body" style:list-style-name="L19">
      <style:paragraph-properties fo:margin-top="0in" fo:margin-bottom="0in" style:contextual-spacing="false" style:writing-mode="lr-tb"/>
    </style:style>
    <style:style style:name="P139" style:family="paragraph" style:parent-style-name="Text_20_body" style:list-style-name="L19">
      <style:paragraph-properties style:writing-mode="lr-tb"/>
    </style:style>
    <style:style style:name="T1" style:family="text">
      <style:text-properties officeooo:rsid="0006d41a"/>
    </style:style>
    <style:style style:name="T2" style:family="text">
      <style:text-properties officeooo:rsid="0007184d"/>
    </style:style>
    <style:style style:name="T3" style:family="text">
      <style:text-properties officeooo:rsid="00086a49"/>
    </style:style>
    <style:style style:name="T4" style:family="text">
      <style:text-properties officeooo:rsid="000c01d2"/>
    </style:style>
    <style:style style:name="T5" style:family="text">
      <style:text-properties officeooo:rsid="000f9d84"/>
    </style:style>
    <style:style style:name="T6" style:family="text">
      <style:text-properties officeooo:rsid="0011a2f2"/>
    </style:style>
    <style:style style:name="T7" style:family="text">
      <style:text-properties officeooo:rsid="00128916"/>
    </style:style>
    <style:style style:name="T8" style:family="text">
      <style:text-properties officeooo:rsid="001530cc"/>
    </style:style>
    <style:style style:name="T9" style:family="text">
      <style:text-properties officeooo:rsid="0016f4d3"/>
    </style:style>
    <style:style style:name="T10" style:family="text">
      <style:text-properties officeooo:rsid="001f40fe"/>
    </style:style>
    <style:style style:name="T11" style:family="text">
      <style:text-properties officeooo:rsid="00226b6f"/>
    </style:style>
    <style:style style:name="T12" style:family="text">
      <style:text-properties officeooo:rsid="0026627f"/>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6627f" style:font-weight-asian="bold" style:font-weight-complex="bold"/>
    </style:style>
    <style:style style:name="T16" style:family="text">
      <style:text-properties fo:font-weight="bold" fo:background-color="#f4f6f7" loext:char-shading-value="0" loext:padding-left="0.0417in" loext:padding-right="0in" loext:padding-top="0.0209in" loext:padding-bottom="0.0209in" loext:border-left="0.06pt solid #f4f6f7" loext:border-right="none" loext:border-top="0.06pt solid #f4f6f7" loext:border-bottom="0.06pt solid #f4f6f7"/>
    </style:style>
    <style:style style:name="T17" style:family="text">
      <style:text-properties officeooo:rsid="0028f97c"/>
    </style:style>
    <style:style style:name="T18" style:family="text">
      <style:text-properties officeooo:rsid="0029beca"/>
    </style:style>
    <style:style style:name="T19" style:family="text">
      <style:text-properties officeooo:rsid="002ad29d"/>
    </style:style>
    <style:style style:name="T20" style:family="text">
      <style:text-properties officeooo:rsid="00305546"/>
    </style:style>
    <style:style style:name="T21" style:family="text">
      <style:text-properties officeooo:rsid="0034cfe1"/>
    </style:style>
    <style:style style:name="T22" style:family="text">
      <style:text-properties officeooo:rsid="003609a2"/>
    </style:style>
    <style:style style:name="T23" style:family="text">
      <style:text-properties officeooo:rsid="0038cc84"/>
    </style:style>
    <style:style style:name="T24" style:family="text">
      <style:text-properties officeooo:rsid="003b11b6"/>
    </style:style>
    <style:style style:name="T25" style:family="text">
      <style:text-properties officeooo:rsid="003bfe5c"/>
    </style:style>
    <style:style style:name="T26" style:family="text">
      <style:text-properties officeooo:rsid="00472581"/>
    </style:style>
    <style:style style:name="T27" style:family="text">
      <style:text-properties officeooo:rsid="004778b0"/>
    </style:style>
    <style:style style:name="T28" style:family="text">
      <style:text-properties officeooo:rsid="004a1271"/>
    </style:style>
    <style:style style:name="T29" style:family="text">
      <style:text-properties style:text-line-through-style="none" style:text-line-through-type="none" style:font-name="Google Sans" fo:font-size="12pt" style:text-underline-style="none" fo:font-weight="normal" style:text-blinking="false" loext:padding="0in" loext:border="none"/>
    </style:style>
    <style:style style:name="T30" style:family="text">
      <style:text-properties style:text-line-through-style="none" style:text-line-through-type="none" style:font-name="Google Sans" fo:font-size="12pt" style:text-underline-style="none" fo:font-weight="normal" officeooo:rsid="0053f745" style:text-blinking="false" style:font-size-asian="10.5pt" style:font-weight-asian="normal" style:font-size-complex="12pt" style:font-weight-complex="normal" loext:padding="0in" loext:border="none"/>
    </style:style>
    <style:style style:name="T31" style:family="text">
      <style:text-properties style:text-line-through-style="none" style:text-line-through-type="none" style:font-name="Google Sans" fo:font-size="12pt" style:text-underline-style="none" fo:font-weight="bold" style:text-blinking="false" loext:padding="0in" loext:border="none"/>
    </style:style>
    <style:style style:name="T32" style:family="text">
      <style:text-properties style:text-line-through-style="none" style:text-line-through-type="none" style:font-name="Google Sans" fo:font-size="10.5pt" style:text-underline-style="none" fo:font-weight="normal" style:text-blinking="false"/>
    </style:style>
    <style:style style:name="T33" style:family="text">
      <style:text-properties style:text-line-through-style="none" style:text-line-through-type="none" style:font-name="Google Sans" fo:font-size="10.5pt" style:text-underline-style="none" fo:font-weight="bold" style:text-blinking="false" loext:padding="0in" loext:border="none"/>
    </style:style>
    <style:style style:name="T34" style:family="text">
      <style:text-properties style:text-line-through-style="none" style:text-line-through-type="none" style:font-name="Google Sans" style:text-underline-style="none" style:text-blinking="false" loext:padding="0in" loext:border="none"/>
    </style:style>
    <style:style style:name="T35" style:family="text">
      <style:text-properties style:text-line-through-style="none" style:text-line-through-type="none" style:font-name="Google Sans" style:text-underline-style="none" officeooo:rsid="0053f745" style:text-blinking="false" style:font-size-asian="10.5pt" style:font-weight-asian="normal" style:font-size-complex="12pt" style:font-weight-complex="normal" loext:padding="0in" loext:border="none"/>
    </style:style>
    <style:style style:name="T36" style:family="text">
      <style:text-properties style:text-line-through-style="none" style:text-line-through-type="none" style:font-name="Google Sans" style:text-underline-style="none" fo:font-weight="bold" style:text-blinking="false" loext:padding="0in" loext:border="none"/>
    </style:style>
    <style:style style:name="T37" style:family="text">
      <style:text-properties style:text-line-through-style="none" style:text-line-through-type="none" style:font-name="Google Sans" style:text-underline-style="none" fo:font-weight="bold" officeooo:rsid="0053f745" style:text-blinking="false" style:font-size-asian="10.5pt" style:font-weight-asian="normal" style:font-size-complex="12pt" style:font-weight-complex="normal" loext:padding="0in" loext:border="none"/>
    </style:style>
    <style:style style:name="T38" style:family="text">
      <style:text-properties style:text-line-through-style="none" style:text-line-through-type="none" style:text-underline-style="none" style:text-blinking="false" loext:padding="0in" loext:border="none"/>
    </style:style>
    <style:style style:name="T39" style:family="text">
      <style:text-properties style:text-line-through-style="none" style:text-line-through-type="none" style:font-name="monospace" fo:font-size="10.5pt" style:text-underline-style="none" fo:font-weight="normal" style:text-blinking="false" loext:padding-left="0in" loext:padding-right="0in" loext:padding-top="0in" loext:padding-bottom="0.0193in" loext:border-left="none" loext:border-right="none" loext:border-top="none" loext:border-bottom="0.06pt solid #2c2e35"/>
    </style:style>
    <style:style style:name="T40" style:family="text">
      <style:text-properties style:text-line-through-style="none" style:text-line-through-type="none" style:font-name="monospace" fo:font-size="10.5pt" style:text-underline-style="none" fo:font-weight="normal" style:text-blinking="false" loext:padding="0in" loext:border="none"/>
    </style:style>
    <style:style style:name="T41" style:family="text">
      <style:text-properties style:text-line-through-style="none" style:text-line-through-type="none" style:font-name="monospace" fo:font-size="10.5pt" style:text-underline-style="none" fo:font-weight="bold" style:text-blinking="false" loext:padding-left="0in" loext:padding-right="0in" loext:padding-top="0in" loext:padding-bottom="0.0193in" loext:border-left="none" loext:border-right="none" loext:border-top="none" loext:border-bottom="0.06pt solid #2c2e35"/>
    </style:style>
    <style:style style:name="T42" style:family="text">
      <style:text-properties style:text-line-through-style="none" style:text-line-through-type="none" style:font-name="monospace" fo:font-size="10.5pt" style:text-underline-style="none" fo:font-weight="bold" officeooo:rsid="0053f745" style:text-blinking="false" style:font-size-asian="10.5pt" style:font-size-complex="12pt" loext:padding-left="0in" loext:padding-right="0in" loext:padding-top="0in" loext:padding-bottom="0.0193in" loext:border-left="none" loext:border-right="none" loext:border-top="none" loext:border-bottom="0.06pt solid #2c2e35"/>
    </style:style>
    <style:style style:name="T43" style:family="text">
      <style:text-properties style:text-line-through-style="none" style:text-line-through-type="none" style:font-name="monospace" fo:font-size="10.5pt" style:text-underline-style="none" style:text-blinking="false" loext:padding-left="0in" loext:padding-right="0in" loext:padding-top="0in" loext:padding-bottom="0.0193in" loext:border-left="none" loext:border-right="none" loext:border-top="none" loext:border-bottom="0.06pt solid #2c2e35"/>
    </style:style>
    <style:style style:name="T44" style:family="text">
      <style:text-properties fo:font-weight="normal"/>
    </style:style>
    <style:style style:name="T45" style:family="text">
      <style:text-properties fo:font-weight="normal" fo:background-color="#f4f6f7" loext:char-shading-value="0" loext:padding-left="0.0417in" loext:padding-right="0in" loext:padding-top="0.0209in" loext:padding-bottom="0.0209in" loext:border-left="0.06pt solid #f4f6f7" loext:border-right="none" loext:border-top="0.06pt solid #f4f6f7" loext:border-bottom="0.06pt solid #f4f6f7"/>
    </style:style>
    <style:style style:name="T46" style:family="text">
      <style:text-properties fo:background-color="#f4f6f7" loext:char-shading-value="0" loext:padding-left="0.0417in" loext:padding-right="0in" loext:padding-top="0.0209in" loext:padding-bottom="0.0209in" loext:border-left="0.06pt solid #f4f6f7" loext:border-right="none" loext:border-top="0.06pt solid #f4f6f7" loext:border-bottom="0.06pt solid #f4f6f7"/>
    </style:style>
    <style:style style:name="T47" style:family="text">
      <style:text-properties fo:background-color="#f4f6f7" loext:char-shading-value="0" loext:padding="0in" loext:border="none"/>
    </style:style>
    <style:style style:name="T48" style:family="text">
      <style:text-properties fo:color="#9334e6" loext:opacity="100%" fo:background-color="#f4f6f7" loext:char-shading-value="0" loext:padding="0in" loext:border="none"/>
    </style:style>
    <style:style style:name="T49" style:family="text">
      <style:text-properties fo:color="#c5221f" loext:opacity="100%" fo:background-color="#f4f6f7" loext:char-shading-value="0" loext:padding="0in" loext:border="none"/>
    </style:style>
    <style:style style:name="T50" style:family="text">
      <style:text-properties fo:font-style="italic"/>
    </style:style>
    <style:style style:name="T51" style:family="text">
      <style:text-properties fo:font-style="italic" fo:font-weight="normal"/>
    </style:style>
    <style:style style:name="T5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P-1: POWER ON</text:p>
      <text:p text:style-name="P1">--------------------------------</text:p>
      <text:p text:style-name="P1">1. Resets the system and cpu registers</text:p>
      <text:p text:style-name="P1">2. once reset releases, cpu PC will have ROM base address.</text:p>
      <text:p text:style-name="P1">3. hands over to ROM on R5F MCU.</text:p>
      <text:p text:style-name="P1"/>
      <text:p text:style-name="P1">STEP-2: ROM</text:p>
      <text:p text:style-name="P1">-------------------------------</text:p>
      <text:p text:style-name="P1">1. Initialises CPU mode</text:p>
      <text:p text:style-name="P1">2. set up stack pointer and initialises some CPU registers.</text:p>
      <text:p text:style-name="P1">3. Read Boot mode pins and initialises selected boot peripheral.</text:p>
      <text:p text:style-name="P1">4. Locate tiboot3.bin entry point according to TI’s boot format.</text:p>
      <text:p text:style-name="P1">5. if secure boot enabled and HS, verifies signature, public key, image Hashes.., if invalid, boot halts.</text:p>
      <text:p text:style-name="P1">6. if secure boot enabled and GP, verifies signature and public key, and proceed the boot.</text:p>
      <text:p text:style-name="P1">7. Loads tiboot3.bin entry point in SRAM.</text:p>
      <text:p text:style-name="P1"/>
      <text:p text:style-name="P1">STEP-3: TIBOOT3.BIN (RF5 SPL)</text:p>
      <text:p text:style-name="P1">--------------------------------------------</text:p>
      <text:p text:style-name="P1">1. <text:s/>Runs in MCU R5F core in sram</text:p>
      <text:p text:style-name="P1">2. <text:s/><text:span text:style-name="T1">it intialises UART, clock framework, pin <text:s/>multiplexing, watchdog timer.</text:span></text:p>
      <text:p text:style-name="P2">3. Reads board id in EEPROM via I2C and knows about board.</text:p>
      <text:p text:style-name="P2">4. <text:s/>Configure PMIC over I2C.</text:p>
      <text:p text:style-name="P2">5. <text:s/>configures DDR controller and PHY, trains DDR, checks timing.</text:p>
      <text:p text:style-name="P2">6. Loads SYSFW.itb and starts DMSC processor.</text:p>
      <text:p text:style-name="P2">7. DMSC processor starts executing SYSFW.itb</text:p>
      <text:p text:style-name="P2">8. TIBOOT3.bin sends :<text:line-break/> <text:s text:c="4"/>board-cfg.bin, rm-cfg.bin, pm-cfg.bin and sec-cfg.bin to SYSFW.bin</text:p>
      <text:p text:style-name="P7"><text:span text:style-name="T2">9</text:span><text:span text:style-name="T1">. </text:span>System Firmware now learns:</text:p>
      <text:p text:style-name="P5">host Ids, resource ownership, power permissions, security permissions.</text:p>
      <text:p text:style-name="P7"><text:span text:style-name="T1">10. Loads TISPL.bin </text:span><text:span text:style-name="T2">into DDR.</text:span></text:p>
      <text:p text:style-name="P6">11. Program counter now has tispl.bin entry point</text:p>
      <text:p text:style-name="P6">STEP-4: TISPL.BIN (A72 SPL)</text:p>
      <text:p text:style-name="P6">--------------------------------------------</text:p>
      <text:p text:style-name="P6">1.<text:span text:style-name="T3">initialises U-BOOT framework</text:span></text:p>
      <text:p text:style-name="P6">Now much more of U-Boot becomes available.</text:p>
      <text:p text:style-name="Text_20_body">It initializes:</text:p>
      <text:list xml:id="list1313468705" text:style-name="L1">
        <text:list-item>
          <text:p text:style-name="P101">Heap </text:p>
        </text:list-item>
        <text:list-item>
          <text:p text:style-name="P101">Driver Model (DM) </text:p>
        </text:list-item>
        <text:list-item>
          <text:p text:style-name="P101">Console </text:p>
        </text:list-item>
        <text:list-item>
          <text:p text:style-name="P101">Timer </text:p>
        </text:list-item>
        <text:list-item>
          <text:p text:style-name="P101">Environment </text:p>
        </text:list-item>
        <text:list-item>
          <text:p text:style-name="P100">Memory allocator</text:p>
        </text:list-item>
      </text:list>
      <text:p text:style-name="P8">2. Probe hardware like SPI, USB, ETHERNET, I2C, EEPROM, GPIO using uboot drivers</text:p>
      <text:p text:style-name="P8">3. ReRead boot source again and mount FAT partition.</text:p>
      <text:p text:style-name="P8"><text:soft-page-break/>4. Looks for Uboot.img</text:p>
      <text:list xml:id="list498183229" text:style-name="L2">
        <text:list-item>
          <text:p text:style-name="P102">image contains header and actual uboot code</text:p>
        </text:list-item>
        <text:list-item>
          <text:p text:style-name="P102">image header contains load address, entry point, image size, checksum</text:p>
        </text:list-item>
      </text:list>
      <text:p text:style-name="P8">5. Loads Uboot.img into DDR</text:p>
      <text:p text:style-name="P8">6. it does cache configuration, MMU setup</text:p>
      <text:p text:style-name="P8">7. Jumps to Uboot.img since PC= entry point to Uboot.img</text:p>
      <text:p text:style-name="P8"/>
      <text:p text:style-name="P8">STEP-5: UBOOT</text:p>
      <text:p text:style-name="P8">----------------------------</text:p>
      <text:p text:style-name="P8">1. Reads Environment variables VIA UENV.TXT</text:p>
      <text:list xml:id="list1826335514" text:style-name="L3">
        <text:list-item>
          <text:p text:style-name="P103">Uenv.txt is a configuration file contains boot_delay, bootcmd, console, fdtfile(device tree blob), bootargs(kernel arguments)</text:p>
        </text:list-item>
        <text:list-item>
          <text:p text:style-name="P104">if No Uenv.txt exists, <text:span text:style-name="T4">loads kernel_addr_r then PC= kernel_addr_r</text:span></text:p>
        </text:list-item>
        <text:list-item>
          <text:p text:style-name="P105">kernel_addr_r is provided by Uenv.txt or extlinux.conf</text:p>
        </text:list-item>
        <text:list-item>
          <text:p text:style-name="P106">kernel_addr_r is in /home/intern/Downloads/evm_sdk_installer/board-support/ti-u-boot-2025.01+git/include/env/ti/ti_common.env</text:p>
        </text:list-item>
        <text:list-item>
          <text:p text:style-name="P107">if FIT image, uboot parses it and loads into DDR</text:p>
        </text:list-item>
      </text:list>
      <text:p text:style-name="P8">2. loads kernel image</text:p>
      <text:p text:style-name="P8">3. loads DTB</text:p>
      <text:p text:style-name="P8">4. loads initrd(if presents)</text:p>
      <text:p text:style-name="P8">5. passes boot arguments.</text:p>
      <text:p text:style-name="P8">6. handover to linux</text:p>
      <text:p text:style-name="P8"/>
      <text:p text:style-name="P51">tiboot3-stage:</text:p>
      <text:p text:style-name="P10">Binmann is the tool that takes neccesary binaries(uboot-spl.bin) and packed into proper boot image format.</text:p>
      <text:p text:style-name="P10">U-Boot Source Files </text:p>
      <text:p text:style-name="P10">│ ▼ Compiler (gcc) </text:p>
      <text:p text:style-name="P10">│ ▼ Object Files (.o) </text:p>
      <text:p text:style-name="P10"><text:s text:c="4"/>▼ Linker (ld) │ </text:p>
      <text:p text:style-name="P10"><text:s text:c="4"/>▼ u-boot-spl.bin │ </text:p>
      <text:p text:style-name="P10"><text:s text:c="4"/>▼ Binman │ </text:p>
      <text:p text:style-name="P10"><text:s text:c="4"/>▼ tiboot3.bin</text:p>
      <text:p text:style-name="P10"/>
      <text:p text:style-name="P4">/home/intern/Downloads/evm_sdk_installer/board-support/ti-u-boot-2025.01+git/arch/arm/cpu/armv8/<text:span text:style-name="T5">start.c</text:span></text:p>
      <text:p text:style-name="P4"/>
      <text:p text:style-name="P10">/home/intern/Downloads/evm_sdk_installer/board-support/ti-u-boot-2025.01+git/board/ti/j721e/<text:line-break/><text:span text:style-name="T6">evm.c and spl.c contains board specific initialisation.</text:span></text:p>
      <text:p text:style-name="P10"/>
      <text:h text:style-name="P9" text:outline-level="1"><text:soft-page-break/>What does <text:span text:style-name="Source_20_Text">board/ti/j721e/spl.c</text:span> do?</text:h>
      <text:p text:style-name="Text_20_body">Typically it contains board-specific SPL functions like:</text:p>
      <text:section text:style-name="Sect1" text:name="code-block-viewer">
        <text:p text:style-name="Preformatted_20_Text"><text:span text:style-name="Source_20_Text">board_init_f()</text:span></text:p>
        <text:p text:style-name="Preformatted_20_Text"/>
        <text:p text:style-name="Preformatted_20_Text"><text:span text:style-name="Source_20_Text">spl_board_init()</text:span></text:p>
        <text:p text:style-name="Preformatted_20_Text"/>
        <text:p text:style-name="Preformatted_20_Text"><text:span text:style-name="Source_20_Text">dram_init()</text:span></text:p>
        <text:p text:style-name="Preformatted_20_Text"/>
        <text:p text:style-name="Preformatted_20_Text"><text:span text:style-name="Source_20_Text">board_fit_config_name_match()</text:span></text:p>
        <text:p text:style-name="Preformatted_20_Text"/>
        <text:p text:style-name="P11"><text:span text:style-name="Source_20_Text">board_boot_order()</text:span></text:p>
      </text:section>
      <text:p text:style-name="Text_20_body">These are called during SPL execution.</text:p>
      <text:p text:style-name="P10"/>
      <text:p text:style-name="P10"/>
      <text:p text:style-name="P2">make j721e_beagleboneai64_r5_defconfig<text:span text:style-name="T7">(build configuration file)</text:span></text:p>
      <text:h text:style-name="P3" text:outline-level="1">Final linking</text:h>
      <text:p text:style-name="Text_20_body">After compilation you get something like:</text:p>
      <text:section text:style-name="Sect1" text:name="Section1">
        <text:p text:style-name="Preformatted_20_Text"><text:bookmark text:name="code-block-viewer"/><text:span text:style-name="Source_20_Text">start.o</text:span></text:p>
        <text:p text:style-name="Preformatted_20_Text"><text:span text:style-name="Source_20_Text">spl.o</text:span></text:p>
        <text:p text:style-name="Preformatted_20_Text"><text:span text:style-name="Source_20_Text">serial.o</text:span></text:p>
        <text:p text:style-name="Preformatted_20_Text"><text:span text:style-name="Source_20_Text">mmc.o</text:span></text:p>
        <text:p text:style-name="Preformatted_20_Text"><text:span text:style-name="Source_20_Text">fat.o</text:span></text:p>
        <text:p text:style-name="Preformatted_20_Text"><text:span text:style-name="Source_20_Text">clk.o</text:span></text:p>
        <text:p text:style-name="Preformatted_20_Text"><text:span text:style-name="Source_20_Text">i2c.o</text:span></text:p>
        <text:p text:style-name="Preformatted_20_Text"><text:span text:style-name="Source_20_Text">dram.o</text:span></text:p>
        <text:p text:style-name="Preformatted_20_Text"><text:span text:style-name="Source_20_Text">board.o</text:span></text:p>
        <text:p text:style-name="P11"><text:span text:style-name="Source_20_Text">...</text:span></text:p>
      </text:section>
      <text:p text:style-name="Text_20_body">The linker combines them:</text:p>
      <text:section text:style-name="Sect1" text:name="Section2">
        <text:p text:style-name="Preformatted_20_Text"><text:bookmark text:name="code-block-viewer1"/><text:span text:style-name="Source_20_Text">ld</text:span></text:p>
        <text:p text:style-name="Preformatted_20_Text"><text:span text:style-name="Source_20_Text"><text:s/>│</text:span></text:p>
        <text:p text:style-name="Preformatted_20_Text"><text:span text:style-name="Source_20_Text"><text:s/>▼</text:span></text:p>
        <text:p text:style-name="Preformatted_20_Text"/>
        <text:p text:style-name="P11"><text:span text:style-name="Source_20_Text">u-boot-spl</text:span></text:p>
      </text:section>
      <text:p text:style-name="Text_20_body">Then:</text:p>
      <text:p text:style-name="P52">Binman </text:p>
      <text:p text:style-name="P52">▼ </text:p>
      <text:p text:style-name="P52">tiboot3.bin</text:p>
      <text:p text:style-name="P52"/>
      <text:p text:style-name="P53">final flow for tiboot3.bin creation:</text:p>
      <text:p text:style-name="P53">----------------------------------------------</text:p>
      <text:p text:style-name="P2">j721e_evm_r5_defconfig</text:p>
      <text:p text:style-name="P2"><text:s text:c="8"/>│</text:p>
      <text:p text:style-name="P2"><text:soft-page-break/><text:s text:c="8"/>▼</text:p>
      <text:p text:style-name="P2">Kconfig</text:p>
      <text:p text:style-name="P2"><text:s text:c="8"/>│</text:p>
      <text:p text:style-name="P2"><text:s text:c="8"/>▼</text:p>
      <text:p text:style-name="P2">Select drivers/features</text:p>
      <text:p text:style-name="P2"><text:s text:c="8"/>│</text:p>
      <text:p text:style-name="P2"><text:s text:c="8"/>▼</text:p>
      <text:p text:style-name="P2">Compile hundreds of .c/.S files</text:p>
      <text:p text:style-name="P2"><text:s text:c="8"/>│</text:p>
      <text:p text:style-name="P2"><text:s text:c="8"/>▼</text:p>
      <text:p text:style-name="P2">Link into u-boot-spl</text:p>
      <text:p text:style-name="P2"><text:s text:c="8"/>│</text:p>
      <text:p text:style-name="P2"><text:s text:c="8"/>▼</text:p>
      <text:p text:style-name="P2">objcopy → u-boot-spl.bin</text:p>
      <text:p text:style-name="P2"><text:s text:c="8"/>│</text:p>
      <text:p text:style-name="P2"><text:s text:c="8"/>▼</text:p>
      <text:p text:style-name="P2">Binman packages it → tiboot3.bin</text:p>
      <text:p text:style-name="P2"/>
      <text:p text:style-name="P2"/>
      <text:p text:style-name="P13">Functions to search for correct flow:</text:p>
      <text:p text:style-name="P13">--------------------------------------------</text:p>
      <text:p text:style-name="P13">Reset → start.S → board_init_f() → spl_init() → board_init_r() → spl_mmc_load_image() → load sysfw.itb → initialize DDR → load tispl.bin → jump to tispl.bin</text:p>
      <text:p text:style-name="P13"/>
      <text:p text:style-name="P14">Tispl.bin stage:</text:p>
      <text:p text:style-name="P14">------------------------------</text:p>
      <text:p text:style-name="P14">file ~/Downloads/evm_sdk_installer/board-support/prebuilt-images/tispl.bin</text:p>
      <text:p text:style-name="P14">dumpimage -l ~/Downloads/evm_sdk_installer/board-support/prebuilt-images/tispl.bin<text:line-break/><text:line-break/>file command reveals tispl.bin is a FIT image</text:p>
      <text:p text:style-name="P14">dumpimage command reveals entry point and load address of tispl.bin</text:p>
      <text:p text:style-name="P14">tiboot3.bin reads fit image header and loads this spl into ddr</text:p>
      <text:p text:style-name="P14"/>
      <text:p text:style-name="P14">tispl.bin is a fit image then how the fit image is created:</text:p>
      <text:p text:style-name="P14">-------------------------------------------------------------------------</text:p>
      <text:p text:style-name="P17"><text:span text:style-name="T8">In the U-Boot source, you'll find an </text:span><text:span text:style-name="Strong_20_Emphasis"><text:span text:style-name="T8">ITS (Image Tree Source)</text:span></text:span><text:span text:style-name="T8"> file—typically named something like </text:span><text:span text:style-name="Source_20_Text"><text:span text:style-name="T8">u-boot.its</text:span></text:span><text:span text:style-name="T8"> or a TI K3-specific variant. It contains entries such as:</text:span></text:p>
      <text:p text:style-name="P17"><text:bookmark text:name="code-block-viewer2"/>images {</text:p>
      <text:p text:style-name="P17"><text:s text:c="4"/>spl {</text:p>
      <text:p text:style-name="P17"><text:s text:c="8"/>data = /incbin/("u-boot-nodtb.bin");</text:p>
      <text:p text:style-name="P17"><text:s text:c="8"/>load = &lt;0x80080000&gt;;</text:p>
      <text:p text:style-name="P17"><text:s text:c="8"/>entry = &lt;0x80080000&gt;;</text:p>
      <text:p text:style-name="P17"><text:s text:c="4"/>};</text:p>
      <text:p text:style-name="P54">}</text:p>
      <text:p text:style-name="P54">find . -name "*.its"</text:p>
      <text:p text:style-name="P15">The important clue in your output</text:p>
      <text:p text:style-name="Text_20_body"><text:soft-page-break/>You found:</text:p>
      <text:p text:style-name="Text_20_body">configs/j721e_evm_r5_defconfig:</text:p>
      <text:p text:style-name="Text_20_body">CONFIG_SPL_LOAD_FIT_ADDRESS=0x80080000</text:p>
      <text:p text:style-name="Text_20_body">configs/j721e_evm_a72_defconfig:</text:p>
      <text:p text:style-name="Text_20_body">CONFIG_SPL_TEXT_BASE=0x80080000</text:p>
      <text:p text:style-name="P14">These configuration options tell U-Boot where the FIT image should be loaded and where the A72 SPL is linked. </text:p>
      <text:p text:style-name="P14"/>
      <text:p text:style-name="P16"><text:span text:style-name="T8">/home/intern/Downloads/evm_sdk_installer/board-support/ti-u-boot-2025.01+git/arch/arm/dts/</text:span>k3-j721e-binman.dtsi, <text:span text:style-name="T9">inside it spl node converted by binmann into tispl.bin FIT image.</text:span></text:p>
      <text:p text:style-name="P16"/>
      <text:p text:style-name="P17">You were asking earlier:</text:p>
      <text:p text:style-name="Quotations"><text:span text:style-name="Strong_20_Emphasis">Where is the load address and entry point defined?</text:span></text:p>
      <text:p text:style-name="Text_20_body">It is <text:span text:style-name="Strong_20_Emphasis">not</text:span> hardcoded inside <text:span text:style-name="Source_20_Text">tispl.bin</text:span>.</text:p>
      <text:p text:style-name="Text_20_body">It originates from:</text:p>
      <text:section text:style-name="Sect1" text:name="Section3">
        <text:p text:style-name="Preformatted_20_Text"><text:bookmark text:name="code-block-viewer3"/><text:span text:style-name="Source_20_Text">Kconfig</text:span></text:p>
        <text:p text:style-name="Preformatted_20_Text"><text:span text:style-name="Source_20_Text"><text:s text:c="8"/>↓</text:span></text:p>
        <text:p text:style-name="Preformatted_20_Text"><text:span text:style-name="Source_20_Text">CONFIG_SPL_TEXT_BASE</text:span></text:p>
        <text:p text:style-name="Preformatted_20_Text"><text:span text:style-name="Source_20_Text"><text:s text:c="8"/>↓</text:span></text:p>
        <text:p text:style-name="Preformatted_20_Text"><text:span text:style-name="Source_20_Text">Binman (.dtsi)</text:span></text:p>
        <text:p text:style-name="Preformatted_20_Text"><text:span text:style-name="Source_20_Text"><text:s text:c="8"/>↓</text:span></text:p>
        <text:p text:style-name="Preformatted_20_Text"><text:span text:style-name="Source_20_Text">FIT image</text:span></text:p>
        <text:p text:style-name="Preformatted_20_Text"><text:span text:style-name="Source_20_Text"><text:s text:c="8"/>↓</text:span></text:p>
        <text:p text:style-name="P11"><text:span text:style-name="Source_20_Text">dumpimage</text:span></text:p>
      </text:section>
      <text:p text:style-name="Text_20_body">For J721E you already found:</text:p>
      <text:section text:style-name="Sect1" text:name="Section4">
        <text:p text:style-name="P11"><text:bookmark text:name="code-block-viewer4"/><text:span text:style-name="Source_20_Text">CONFIG_SPL_TEXT_BASE=0x80080000</text:span></text:p>
      </text:section>
      <text:p text:style-name="P18">Overall Flow:</text:p>
      <text:p text:style-name="P18">------------------</text:p>
      <text:p text:style-name="P18"><text:s text:c="17"/>j721e_a72_defconfig</text:p>
      <text:p text:style-name="P18"><text:s text:c="25"/>│</text:p>
      <text:p text:style-name="P18"><text:s text:c="25"/>▼</text:p>
      <text:p text:style-name="P18"><text:s text:c="17"/>CONFIG_SPL_TEXT_BASE</text:p>
      <text:p text:style-name="P18"><text:s text:c="17"/>CONFIG_SPL_LOAD_FIT_ADDRESS</text:p>
      <text:p text:style-name="P18"><text:s text:c="25"/>│</text:p>
      <text:p text:style-name="P18"><text:s text:c="25"/>▼</text:p>
      <text:p text:style-name="P18"><text:s text:c="18"/>U-Boot Build System</text:p>
      <text:p text:style-name="P18"><text:s text:c="25"/>│</text:p>
      <text:p text:style-name="P18"><text:s text:c="10"/>+--------------+--------------+</text:p>
      <text:p text:style-name="P18"><text:s text:c="10"/>| <text:s text:c="28"/>|</text:p>
      <text:p text:style-name="P18"><text:s text:c="10"/>▼ <text:s text:c="28"/>▼</text:p>
      <text:p text:style-name="P18"><text:s text:c="3"/>u-boot-nodtb.bin <text:s text:c="13"/>k3-j721e-binman.dtsi</text:p>
      <text:p text:style-name="P18"><text:s text:c="10"/>| <text:s text:c="28"/>|</text:p>
      <text:p text:style-name="P18"><text:s text:c="10"/>+--------------+--------------+</text:p>
      <text:p text:style-name="P18"><text:s text:c="25"/>│</text:p>
      <text:p text:style-name="P18"><text:s text:c="25"/>▼</text:p>
      <text:p text:style-name="P18"><text:soft-page-break/><text:s text:c="21"/>Binman</text:p>
      <text:p text:style-name="P18"><text:s text:c="25"/>│</text:p>
      <text:p text:style-name="P18"><text:s text:c="25"/>▼</text:p>
      <text:p text:style-name="P18"><text:s text:c="21"/>tispl.bin (FIT)</text:p>
      <text:p text:style-name="P18"/>
      <text:p text:style-name="P18"/>
      <text:p text:style-name="P18">So who decides what?</text:p>
      <text:p text:style-name="P18"/>
      <table:table table:name="Table1" table:style-name="Table1">
        <table:table-column table:style-name="Table1.A"/>
        <table:table-column table:style-name="Table1.B"/>
        <table:table-header-rows>
          <table:table-row>
            <table:table-cell table:style-name="Table1.A1" office:value-type="string">
              <text:p text:style-name="Table_20_Heading">Component</text:p>
            </table:table-cell>
            <table:table-cell table:style-name="Table1.A1" office:value-type="string">
              <text:p text:style-name="Table_20_Heading">Responsibility</text:p>
            </table:table-cell>
          </table:table-row>
        </table:table-header-rows>
        <table:table-row>
          <table:table-cell table:style-name="Table1.A1" office:value-type="string">
            <text:p text:style-name="Table_20_Contents"><text:span text:style-name="Source_20_Text">CONFIG_SPL_TEXT_BASE</text:span></text:p>
          </table:table-cell>
          <table:table-cell table:style-name="Table1.A1" office:value-type="string">
            <text:p text:style-name="Table_20_Contents">Where SPL should execute from</text:p>
          </table:table-cell>
        </table:table-row>
        <table:table-row>
          <table:table-cell table:style-name="Table1.A1" office:value-type="string">
            <text:p text:style-name="Table_20_Contents">Linker</text:p>
          </table:table-cell>
          <table:table-cell table:style-name="Table1.A1" office:value-type="string">
            <text:p text:style-name="Table_20_Contents">Generates ELF entry point</text:p>
          </table:table-cell>
        </table:table-row>
        <table:table-row>
          <table:table-cell table:style-name="Table1.A1" office:value-type="string">
            <text:p text:style-name="Table_20_Contents">Binman</text:p>
          </table:table-cell>
          <table:table-cell table:style-name="Table1.A1" office:value-type="string">
            <text:p text:style-name="Table_20_Contents">Reads ELF information and creates the FIT image</text:p>
          </table:table-cell>
        </table:table-row>
        <table:table-row>
          <table:table-cell table:style-name="Table1.A1" office:value-type="string">
            <text:p text:style-name="Table_20_Contents"><text:span text:style-name="Source_20_Text">dumpimage</text:span></text:p>
          </table:table-cell>
          <table:table-cell table:style-name="Table1.A1" office:value-type="string">
            <text:p text:style-name="Table_20_Contents">Displays the FIT metadata</text:p>
          </table:table-cell>
        </table:table-row>
        <table:table-row>
          <table:table-cell table:style-name="Table1.A1" office:value-type="string">
            <text:p text:style-name="Table_20_Contents"><text:span text:style-name="Source_20_Text">tiboot3.bin</text:span></text:p>
          </table:table-cell>
          <table:table-cell table:style-name="Table1.A1" office:value-type="string">
            <text:p text:style-name="Table_20_Contents">Reads the FIT and loads the image</text:p>
          </table:table-cell>
        </table:table-row>
        <table:table-row>
          <table:table-cell table:style-name="Table1.A1" office:value-type="string">
            <text:p text:style-name="Table_20_Contents">CPU</text:p>
          </table:table-cell>
          <table:table-cell table:style-name="Table1.A1" office:value-type="string">
            <text:p text:style-name="Table_20_Contents">Jumps to the entry point</text:p>
          </table:table-cell>
        </table:table-row>
      </table:table>
      <text:p text:style-name="P18"/>
      <text:p text:style-name="P19">Uboot.img stage:</text:p>
      <text:p text:style-name="P19">------------------------------</text:p>
      <text:p text:style-name="P20">uboot.img creation flow</text:p>
      <text:p text:style-name="P20">U-Boot Sources</text:p>
      <text:p text:style-name="P20"/>
      <text:p text:style-name="P20">↓</text:p>
      <text:p text:style-name="P20"/>
      <text:p text:style-name="P20">Compiler</text:p>
      <text:p text:style-name="P20"/>
      <text:p text:style-name="P20">↓</text:p>
      <text:p text:style-name="P20"/>
      <text:p text:style-name="P20">u-boot</text:p>
      <text:p text:style-name="P20"/>
      <text:p text:style-name="P20">↓</text:p>
      <text:p text:style-name="P20"/>
      <text:p text:style-name="P20">objcopy</text:p>
      <text:p text:style-name="P20"/>
      <text:p text:style-name="P20">↓</text:p>
      <text:p text:style-name="P20"/>
      <text:p text:style-name="P20">u-boot.bin</text:p>
      <text:p text:style-name="P20"/>
      <text:p text:style-name="P20">↓</text:p>
      <text:p text:style-name="P20"/>
      <text:p text:style-name="P20">Binman</text:p>
      <text:p text:style-name="P20"/>
      <text:p text:style-name="P20">↓</text:p>
      <text:p text:style-name="P20"/>
      <text:p text:style-name="P20">u-boot.img (FIT)</text:p>
      <text:p text:style-name="P20"/>
      <text:p text:style-name="P21">build produces files like:</text:p>
      <text:p text:style-name="P21">u-boot <text:s text:c="16"/>&lt;-- ELF executable</text:p>
      <text:p text:style-name="P21">u-boot.bin <text:s text:c="12"/>&lt;-- Raw binary</text:p>
      <text:p text:style-name="P21">u-boot.img <text:s text:c="12"/>&lt;-- FIT image</text:p>
      <text:p text:style-name="P21">spl/u-boot-spl <text:s text:c="8"/>&lt;-- ELF executable</text:p>
      <text:p text:style-name="P21">spl/u-boot-spl.bin <text:s text:c="4"/>&lt;-- Raw binary</text:p>
      <text:p text:style-name="P21"><text:soft-page-break/>C source files</text:p>
      <text:p text:style-name="P21"><text:s text:c="6"/>│</text:p>
      <text:p text:style-name="P21"><text:s text:c="6"/>▼</text:p>
      <text:p text:style-name="P21">Compiler (gcc)</text:p>
      <text:p text:style-name="P21"><text:s text:c="6"/>│</text:p>
      <text:p text:style-name="P21"><text:s text:c="6"/>▼</text:p>
      <text:p text:style-name="P21">Object files (.o)</text:p>
      <text:p text:style-name="P21"><text:s text:c="6"/>│</text:p>
      <text:p text:style-name="P21"><text:s text:c="6"/>▼</text:p>
      <text:p text:style-name="P21">Linker (ld)</text:p>
      <text:p text:style-name="P21"><text:s text:c="6"/>│</text:p>
      <text:p text:style-name="P21"><text:s text:c="6"/>▼</text:p>
      <text:p text:style-name="P21">ELF executable</text:p>
      <text:p text:style-name="P21"><text:s text:c="6"/>│</text:p>
      <text:p text:style-name="P21"><text:s text:c="6"/>├── readelf can show Entry Point</text:p>
      <text:p text:style-name="P21"><text:s text:c="6"/>▼</text:p>
      <text:p text:style-name="P21">objcopy</text:p>
      <text:p text:style-name="P21"><text:s text:c="6"/>│</text:p>
      <text:p text:style-name="P21"><text:s text:c="6"/>▼</text:p>
      <text:p text:style-name="P21">Raw binary (.bin)</text:p>
      <text:p text:style-name="P21"><text:s text:c="6"/>│</text:p>
      <text:p text:style-name="P21"><text:s text:c="6"/>▼</text:p>
      <text:p text:style-name="P21">Binman</text:p>
      <text:p text:style-name="P21"><text:s text:c="6"/>│</text:p>
      <text:p text:style-name="P21"><text:s text:c="6"/>├── Reads binman .dtsi</text:p>
      <text:p text:style-name="P21"><text:s text:c="6"/>├── Reads binary/ELF metadata</text:p>
      <text:p text:style-name="P21"><text:s text:c="6"/>├── Creates FIT image</text:p>
      <text:p text:style-name="P21"><text:s text:c="6"/>▼</text:p>
      <text:p text:style-name="P21">tispl.bin / u-boot.img</text:p>
      <text:p text:style-name="P21"/>
      <text:p text:style-name="P21"/>
      <text:p text:style-name="P21"/>
      <text:p text:style-name="P21"><text:s/>readelf -h spl/u-boot-spl : <text:span text:style-name="T10">command to read entry address for uboot.img</text:span></text:p>
      <text:p text:style-name="P21"/>
      <text:p text:style-name="P21"/>
      <text:p text:style-name="P22"/>
      <text:p text:style-name="P23">Structure of both AI64 and EVM:</text:p>
      <text:p text:style-name="P23">-------------------------------------------</text:p>
      <text:p text:style-name="P23"/>
      <text:p text:style-name="P25">SD Card</text:p>
      <text:p text:style-name="P25">│</text:p>
      <text:p text:style-name="P25">├── Partition 1 (boot)</text:p>
      <text:p text:style-name="P25">│ <text:s text:c="5"/>Filesystem: FAT32</text:p>
      <text:p text:style-name="P25">│</text:p>
      <text:p text:style-name="P25">└── Partition 2 (root)</text:p>
      <text:p text:style-name="P25"><text:s text:c="7"/>Filesystem: EXT4</text:p>
      <text:p text:style-name="P25"/>
      <text:p text:style-name="P26">AI64 Partition1 -FAT:</text:p>
      <text:p text:style-name="P26">----------------------------</text:p>
      <text:p text:style-name="P26">bootfs</text:p>
      <text:p text:style-name="P26">│</text:p>
      <text:p text:style-name="P26"><text:soft-page-break/>├── tiboot3.bin</text:p>
      <text:p text:style-name="P26">├── sysfw.itb</text:p>
      <text:p text:style-name="P26">├── tispl.bin</text:p>
      <text:p text:style-name="P26">├── u-boot.img</text:p>
      <text:p text:style-name="P26">├── Image.gz</text:p>
      <text:p text:style-name="P26">├── initrd.img</text:p>
      <text:p text:style-name="P26">├── extlinux/</text:p>
      <text:p text:style-name="P26">└── overlays/</text:p>
      <text:p text:style-name="P26"/>
      <text:p text:style-name="P26">AI64 Partition2 – EXT4:</text:p>
      <text:p text:style-name="P26">-------------------------------</text:p>
      <text:p text:style-name="P26">rootfs</text:p>
      <text:p text:style-name="P26">│</text:p>
      <text:p text:style-name="P26">├── bin</text:p>
      <text:p text:style-name="P26">├── boot</text:p>
      <text:p text:style-name="P26">├── dev</text:p>
      <text:p text:style-name="P26">├── etc</text:p>
      <text:p text:style-name="P26">├── lib</text:p>
      <text:p text:style-name="P26">├── proc</text:p>
      <text:p text:style-name="P26">├── sys</text:p>
      <text:p text:style-name="P26">├── usr</text:p>
      <text:p text:style-name="P26">└── ...</text:p>
      <text:p text:style-name="P26"/>
      <text:p text:style-name="P26"/>
      <text:p text:style-name="P26">EVM Partition1 – FAT:</text:p>
      <text:p text:style-name="P26">--------------------------------</text:p>
      <text:p text:style-name="P26">bootfs</text:p>
      <text:p text:style-name="P26">│</text:p>
      <text:p text:style-name="P26">├── tiboot3.bin</text:p>
      <text:p text:style-name="P26">├── sysfw.itb</text:p>
      <text:p text:style-name="P26">├── tispl.bin</text:p>
      <text:p text:style-name="P26">├── u-boot.img</text:p>
      <text:p text:style-name="P26">└── uEnv.txt</text:p>
      <text:p text:style-name="P26"/>
      <text:p text:style-name="P26">EVM Partition2 – EXT4:</text:p>
      <text:p text:style-name="P26">---------------------------------</text:p>
      <text:p text:style-name="P26">rootfs</text:p>
      <text:p text:style-name="P26">│</text:p>
      <text:p text:style-name="P26">├── boot/</text:p>
      <text:p text:style-name="P26">│ <text:s text:c="4"/>├── Image</text:p>
      <text:p text:style-name="P26">│ <text:s text:c="4"/>├── dtb/</text:p>
      <text:p text:style-name="P26">│ <text:s text:c="4"/>├── fitImage</text:p>
      <text:p text:style-name="P26">│ <text:s text:c="4"/>└── EFI/</text:p>
      <text:p text:style-name="P26">├── bin</text:p>
      <text:p text:style-name="P26">├── dev</text:p>
      <text:p text:style-name="P26">├── etc</text:p>
      <text:p text:style-name="P26">├── lib</text:p>
      <text:p text:style-name="P26">└── ...</text:p>
      <text:p text:style-name="P26"/>
      <text:p text:style-name="P26"/>
      <text:p text:style-name="P26"/>
      <text:p text:style-name="P27"><text:soft-page-break/>Reasons for not working:<text:line-break/>-----------------------------</text:p>
      <text:p text:style-name="P27">Th<text:span text:style-name="T11">e </text:span>diff shows that <text:span text:style-name="Strong_20_Emphasis">changing the EEPROM ID alone is not enough</text:span>, because the EVM board file expects several EVM-specific behaviors (EEPROM handling, daughter-card detection, PMIC resume logic, etc.) that the AI-64 firmware does not use.</text:p>
      <text:p text:style-name="P27"/>
      <text:p text:style-name="P28">EVM uses Ti TPS659413 family PMIC<text:line-break/>PMIC node exists in /home/intern/Downloads/evm_sdk_installer/board-support/ti-u-boot-2025.01+git/arch/arm/dts/k3-j721e-r5-common-proc-board.dts </text:p>
      <text:p text:style-name="P30">J721e SoM uses two pmic:</text:p>
      <text:p text:style-name="P29"><text:span text:style-name="T14">tps659413</text:span> <text:span text:style-name="T12">and </text:span>I2c address is <text:span text:style-name="T14">0x48</text:span></text:p>
      <text:p text:style-name="P29"><text:span text:style-name="T14">tps65941</text:span><text:span text:style-name="T15">1</text:span><text:span text:style-name="T12"> and i2c address is</text:span><text:span text:style-name="T15"> 0x4c</text:span></text:p>
      <text:p text:style-name="P31">but uses same driver <text:span text:style-name="T14">ti,tps6594-q1</text:span></text:p>
      <text:p text:style-name="P50"/>
      <text:p text:style-name="P31"><text:span text:style-name="T14">k3-j721e-beagleboneai64.dts </text:span><text:span text:style-name="T17">file includes k3-j721e.dtsi and another file k3-j721e-sk.dtsi which has pmic node and uses the same k3-j721e.dtsi<text:line-break/><text:line-break/></text:span><text:span text:style-name="T18">conclusion for PMIC:</text:span></text:p>
      <text:p text:style-name="P31">-------------------------------</text:p>
      <text:p text:style-name="P32">both evm and ai64 primary and secondary PMIC, i2c address, drivers, Buck regulators, ldo regulators, regulator always on, regulator boot on are same. So boot halts unlikely because of PMIC.</text:p>
      <text:p text:style-name="P32"/>
      <text:p text:style-name="P33">Conclusion for DDR:</text:p>
      <text:p text:style-name="P33">---------------------------------</text:p>
      <text:p text:style-name="P33">EVM:</text:p>
      <text:p text:style-name="P33">----------</text:p>
      <text:p text:style-name="P33">k3-j721e-r5-common-proc-board.dts</text:p>
      <text:p text:style-name="P33"><text:s text:c="8"/>│</text:p>
      <text:p text:style-name="P33"><text:s text:c="8"/>├── k3-j721e-common-proc-board.dts</text:p>
      <text:p text:style-name="P33"><text:s text:c="8"/>├── k3-j721e-ddr-evm-lp4-4266.dtsi</text:p>
      <text:p text:style-name="P33"><text:s text:c="8"/>└── k3-j721e-binman.dtsi</text:p>
      <text:p text:style-name="P33">AI64:</text:p>
      <text:p text:style-name="P33">----------</text:p>
      <text:p text:style-name="P33">k3-j721e-r5-beagleboneai64.dts</text:p>
      <text:p text:style-name="P33"><text:s text:c="8"/>│</text:p>
      <text:p text:style-name="P33"><text:s text:c="8"/>├── k3-j721e-beagleboneai64.dts</text:p>
      <text:p text:style-name="P33"><text:s text:c="8"/>├── k3-j721e-ddr-beagleboneai64-lp4-3200.dtsi</text:p>
      <text:p text:style-name="P33"><text:s text:c="8"/>└── k3-j721e-beagleboneai64-u-boot.dtsi</text:p>
      <text:p text:style-name="P33"/>
      <text:p text:style-name="P33">command to find actual difference: <text:span text:style-name="T19">vim</text:span>diff -u \</text:p>
      <text:p text:style-name="P33">arch/arm/dts/k3-j721e-ddr-evm-lp4-4266.dtsi \</text:p>
      <text:p text:style-name="P33">arch/arm/dts/k3-j721e-ddr-beagleboneai64-lp4-3200.dtsi</text:p>
      <text:p text:style-name="P33"/>
      <text:p text:style-name="P34">both uses different files so might halt successful boot.</text:p>
      <text:p text:style-name="P34"/>
      <text:p text:style-name="P34"/>
      <text:p text:style-name="P35">Conclusion for Sysfw.itb:</text:p>
      <text:p text:style-name="P35">----------------------------</text:p>
      <text:p text:style-name="P35">command to refer sysfw.itb : dumpimage -l \</text:p>
      <text:p text:style-name="P35">~/Downloads/evm_sdk_installer/board-support/prebuilt-images/sysfw.itb</text:p>
      <text:p text:style-name="P36"><text:soft-page-break/>Sysfw.itb is almost same except pm-cfg.bin(2 bytes and 212 bytes) in both boards, and hashes are different. <text:span text:style-name="T20">But better using board related sysfw.itb. </text:span></text:p>
      <text:p text:style-name="P36"/>
      <text:p text:style-name="P37"><text:span text:style-name="T23">Conclusion for </text:span>Pinmux:</text:p>
      <text:p text:style-name="P37">-------------------------------</text:p>
      <text:p text:style-name="P37">evm uses k3-j721e-common-proc-board.dts</text:p>
      <text:p text:style-name="P37">ai64 uses k3-j721e-beagleboneai64.dts</text:p>
      <text:p text:style-name="P37"/>
      <text:p text:style-name="P39">pins for main_mmc1 in evm has cmd, clk, clklb, <text:s/>data 0 to 3, sdcd, sdwp</text:p>
      <text:p text:style-name="P39">pins for main_mmc1 in ai64 has cmd, clk, clklb, data 0 to 3, sdcd <text:line-break/><text:line-break/><text:span text:style-name="T21">sd card pins are not an issue.</text:span></text:p>
      <text:p text:style-name="P40">wkup_i2c0 both evm and ai64 uses same pins, so i2c0 isnt a problem.</text:p>
      <text:p text:style-name="P40">For eeprom, bbai64 has wkup_pmx0 defined eeprom and <text:a xlink:type="simple" xlink:href="mailto:eeprom@50" text:style-name="Internet_20_link" text:visited-style-name="Visited_20_Internet_20_Link">eeprom@50</text:a> node also exists which is not in evm <text:span text:style-name="T22">related dts file.</text:span></text:p>
      <text:p text:style-name="P41">Eeprom interface is same on both boards.</text:p>
      <text:p text:style-name="P41"/>
      <text:p text:style-name="P42">Boot <text:s/>critical peripherals MMC1, eeprom interface, wkup_i2c0. All are almost same. <text:span text:style-name="T24">Pinmuxing pins for all 3 are mostly same, for mmc1 sd write protect not included but not much boot serious issue.</text:span></text:p>
      <text:p text:style-name="P42"/>
      <text:p text:style-name="P42"/>
      <text:p text:style-name="P42">openssl x509 -inform DER -in ai64/tiboot3.bin -text -noout – <text:span text:style-name="T25">to find certificate information</text:span></text:p>
      <text:p text:style-name="P42"/>
      <text:p text:style-name="P42"/>
      <text:p text:style-name="P42">Boot ROM</text:p>
      <text:p text:style-name="P42"/>
      <text:p text:style-name="P42">↓</text:p>
      <text:p text:style-name="P42"/>
      <text:p text:style-name="P42">SPL start</text:p>
      <text:p text:style-name="P42"/>
      <text:p text:style-name="P42">↓</text:p>
      <text:p text:style-name="P42"/>
      <text:p text:style-name="P42">board_init_f()</text:p>
      <text:p text:style-name="P42"/>
      <text:p text:style-name="P42">↓</text:p>
      <text:p text:style-name="P42"/>
      <text:p text:style-name="P42">spl_early_init()</text:p>
      <text:p text:style-name="P42"/>
      <text:p text:style-name="P42">↓</text:p>
      <text:p text:style-name="P42"/>
      <text:p text:style-name="P42">board_init()</text:p>
      <text:p text:style-name="P42"/>
      <text:p text:style-name="P42">↓</text:p>
      <text:p text:style-name="P42"/>
      <text:p text:style-name="P42">DDR init</text:p>
      <text:p text:style-name="P42"/>
      <text:p text:style-name="P42">↓</text:p>
      <text:p text:style-name="P42"/>
      <text:p text:style-name="P42">Load SYSFW</text:p>
      <text:p text:style-name="P42"/>
      <text:p text:style-name="P42">↓</text:p>
      <text:p text:style-name="P42"><text:soft-page-break/></text:p>
      <text:p text:style-name="P42">Load tispl.bin</text:p>
      <text:p text:style-name="P42"/>
      <text:p text:style-name="P42"/>
      <text:p text:style-name="P42"/>
      <text:p text:style-name="P42"/>
      <text:p text:style-name="P43"/>
      <text:p text:style-name="P37">/home/intern/Downloads/evm_sdk_installer/board-support/ti-u-boot-2025.01+git/arch/arm/mach-k3/j721e/</text:p>
      <text:p text:style-name="P37"/>
      <text:p text:style-name="P37">cd ~/Downloads/evm_sdk_installer/board-support/ti-u-boot-2025.01+git</text:p>
      <text:p text:style-name="P37"/>
      <text:p text:style-name="P37">make ARCH=arm CROSS_COMPILE=aarch64-linux-gnu- j721e_evm_a72_defconfig O=a72</text:p>
      <text:p text:style-name="P37"/>
      <text:p text:style-name="P37">make ARCH=arm CROSS_COMPILE=aarch64-linux-gnu- \</text:p>
      <text:p text:style-name="P37"><text:s text:c="2"/>BL31=~/Downloads/evm_sdk_installer/board-support/prebuilt-images/bl31.bin \</text:p>
      <text:p text:style-name="P37"><text:s text:c="2"/>TEE=~/Downloads/evm_sdk_installer/board-support/prebuilt-images/bl32.bin \</text:p>
      <text:p text:style-name="P37"><text:s text:c="2"/><text:span text:style-name="T27">DM</text:span><text:span text:style-name="T26">=~/Downloads/evm_sdk_installer/board-support/prebuilt-images/ti-dm/j721e/ipc_echo_testb_mcu1_0_release_strip.xer5f.signed</text:span></text:p>
      <text:p text:style-name="P37"><text:s text:c="2"/>BINMAN_ALLOW_MISSING=1 \</text:p>
      <text:p text:style-name="P37"><text:s text:c="2"/>O=a72</text:p>
      <text:p text:style-name="P37"/>
      <text:p text:style-name="P38">make ARCH=arm CROSS_COMPILE=aarch64-linux-gnu- \</text:p>
      <text:p text:style-name="P38"><text:s text:c="2"/>BL31=~/Downloads/evm_sdk_installer/board-support/prebuilt-images/bl31.bin \</text:p>
      <text:p text:style-name="P38"><text:s text:c="2"/>TEE=~/Downloads/evm_sdk_installer/board-support/prebuilt-images/bl32.bin \</text:p>
      <text:p text:style-name="P38"><text:s text:c="2"/><text:span text:style-name="T27">DM</text:span><text:span text:style-name="T26">=~/Downloads/evm_sdk_installer/board-support/prebuilt-images/ti-dm/j721e/ipc_echo_testb_mcu1_0_release_strip.xer5f.signed</text:span></text:p>
      <text:p text:style-name="P38"><text:s text:c="2"/>O=a72</text:p>
      <text:p text:style-name="P38"/>
      <text:p text:style-name="P38">make ARCH=arm mrproper</text:p>
      <text:p text:style-name="P38">make ARCH=arm j721e_beagleboneai64_a72_defconfig O=a72</text:p>
      <text:p text:style-name="P38">make ARCH=arm CROSS_COMPILE=aarch64-linux-gnu- \</text:p>
      <text:p text:style-name="P38">BL31=/home/intern/Downloads/evm_sdk_installer/board-support/prebuilt-images/bl31.bin \</text:p>
      <text:p text:style-name="P38">TEE=/home/intern/Downloads/evm_sdk_installer/board-support/prebuilt-images/bl32.bin \</text:p>
      <text:p text:style-name="P38">BINMAN_INDIRS=/home/intern/Downloads/evm_sdk_installer/board-support/prebuilt-images/ \</text:p>
      <text:p text:style-name="P38">O=a72</text:p>
      <text:p text:style-name="P38"/>
      <text:p text:style-name="P98">in /<text:span text:style-name="T28">uboot/board/ti/common/</text:span>board_detect.c, int __maybe_unused ti_i2c_eeprom_am6_get forced skip by placing return 0 in first line of the function.</text:p>
      <text:p text:style-name="P38"/>
      <text:p text:style-name="P38"/>
      <text:p text:style-name="P99">THIS IS HOW <text:s/>FILES SHOULD BE IN PARTITION:</text:p>
      <text:p text:style-name="P97">-------------------------------------------------------------------</text:p>
      <text:p text:style-name="P38">/media/intern/boot$ ls</text:p>
      <text:p text:style-name="P38">old <text:s/>sysfw.itb <text:s/>tiboot3.bin <text:s/>tispl.bin <text:s/>u-boot.img <text:s/>uEnv.txt</text:p>
      <text:p text:style-name="P38"/>
      <text:p text:style-name="P38">/media/intern/root/boot$ ls</text:p>
      <text:p text:style-name="P38">dtb <text:s text:c="6"/>fitImage-6.12.57-ti-01343-g15b58b1dcd0e-dirty <text:s/>uEnv.txt</text:p>
      <text:p text:style-name="P38">EFI <text:s text:c="6"/>Image</text:p>
      <text:p text:style-name="P38">fitImage <text:s/>Image-6.12.57-ti-01343-g15b58b1dcd0e-dirty</text:p>
      <text:p text:style-name="P38">intern@intern-HP-Z2-SFF-G4-Workstation:/media/intern/root/boot$ cd EFI/</text:p>
      <text:p text:style-name="P38">intern@intern-HP-Z2-SFF-G4-Workstation:/media/intern/root/boot/EFI$ cd BOOT/</text:p>
      <text:p text:style-name="P38"><text:soft-page-break/>intern@intern-HP-Z2-SFF-G4-Workstation:/media/intern/root/boot/EFI/BOOT$ ls</text:p>
      <text:p text:style-name="P38">bootaa64.efi <text:s/>grub.cfg</text:p>
      <text:p text:style-name="P38"/>
      <text:p text:style-name="P44"/>
      <text:p text:style-name="P44"/>
      <text:p text:style-name="P44"/>
      <text:p text:style-name="P44"/>
      <text:p text:style-name="P69">Engineering Reference Document: Porting TI J721E EVM U-Boot SDK to BeagleBone AI-64</text:p>
      <text:p text:style-name="P56"><text:span text:style-name="T29">This document serves as a technical summary and structural reference for the modifications required to successfully compile, bundle, and boot a customized </text:span><text:span text:style-name="Strong_20_Emphasis"><text:span text:style-name="T31">U-Boot (v2025.01)</text:span></text:span><text:span text:style-name="T29"> binary from the </text:span><text:span text:style-name="Strong_20_Emphasis"><text:span text:style-name="T31">TI Processor SDK</text:span></text:span><text:span text:style-name="T29"> onto a </text:span><text:span text:style-name="Strong_20_Emphasis"><text:span text:style-name="T31">BeagleBone AI-64</text:span></text:span><text:span text:style-name="T29"> physical platform.</text:span></text:p>
      <text:p text:style-name="P75">1. Hardware Architecture Overview</text:p>
      <text:p text:style-name="P62"><text:span text:style-name="T29">While both the </text:span><text:span text:style-name="Strong_20_Emphasis"><text:span text:style-name="T31">TI J721E EVM/SK</text:span></text:span><text:span text:style-name="T29"> reference systems and the open-source </text:span><text:span text:style-name="Strong_20_Emphasis"><text:span text:style-name="T31">BeagleBone AI-64</text:span></text:span><text:span text:style-name="T29"> are powered by the identical </text:span><text:span text:style-name="Strong_20_Emphasis"><text:span text:style-name="T31">Texas Instruments TDA4VM SoC</text:span></text:span><text:span text:style-name="T29">, their external topologies differ significantly:</text:span></text:p>
      <text:list xml:id="list2035378447" text:style-name="L4">
        <text:list-item>
          <text:p text:style-name="P108"><text:span text:style-name="Strong_20_Emphasis"><text:span text:style-name="T31">DDR Layout Compatibility:</text:span></text:span><text:span text:style-name="T29"> Both designs use a 4GB LPDDR4 matrix over a 32-bit wide bus, allowing cross-compatibility of timing profiles if adjusted inside early code stages.</text:span></text:p>
        </text:list-item>
        <text:list-item>
          <text:p text:style-name="P109"><text:span text:style-name="Strong_20_Emphasis"><text:span text:style-name="T31">PMIC Mapping Alignment:</text:span></text:span><text:span text:style-name="T29"> Both systems share a matching pair of </text:span><text:span text:style-name="Strong_20_Emphasis"><text:span text:style-name="T31">TPS6594</text:span></text:span><text:span text:style-name="T29"> power management components (</text:span><text:span text:style-name="Source_20_Text"><text:span text:style-name="T39">TPS65941213</text:span></text:span><text:span text:style-name="T29"> and </text:span><text:span text:style-name="Source_20_Text"><text:span text:style-name="T39">TPS65941111</text:span></text:span><text:span text:style-name="T29">) operating at base address </text:span><text:span text:style-name="Strong_20_Emphasis"><text:span text:style-name="Source_20_Text"><text:span text:style-name="T41">0x48</text:span></text:span></text:span><text:span text:style-name="T29"> inside the Wake-up I2C bus domain.</text:span></text:p>
        </text:list-item>
        <text:list-item>
          <text:p text:style-name="P109"><text:span text:style-name="Strong_20_Emphasis"><text:span text:style-name="T31">EEPROM Identity Barrier:</text:span></text:span><text:span text:style-name="T29"> The standard enterprise TI SDK relies on specific EEPROM parameters (</text:span><text:span text:style-name="Source_20_Text"><text:span text:style-name="T39">0x50/0x51</text:span></text:span><text:span text:style-name="T29">) to validate hardware capabilities before mapping standard devices, which crashes when executed on the alternate BeagleBone architecture.</text:span></text:p>
        </text:list-item>
      </text:list>
      <text:p text:style-name="P77"/>
      <text:p text:style-name="P76">2. Structural Code Modification Tracking</text:p>
      <text:p text:style-name="P67">2.1 Bypassing the TI Board ID Verification Crash</text:p>
      <text:list xml:id="list2898649744" text:style-name="L5">
        <text:list-item>
          <text:p text:style-name="P110"><text:span text:style-name="Strong_20_Emphasis"><text:span text:style-name="T31">File Location:</text:span></text:span><text:span text:style-name="T29"> </text:span><text:span text:style-name="Source_20_Text"><text:span text:style-name="T39">board/ti/common/board_detect.c</text:span></text:span></text:p>
        </text:list-item>
        <text:list-item>
          <text:p text:style-name="P110"><text:span text:style-name="Strong_20_Emphasis"><text:span text:style-name="T31">Target Function:</text:span></text:span><text:span text:style-name="T29"> </text:span><text:span text:style-name="Source_20_Text"><text:span text:style-name="T39">int __maybe_unused ti_i2c_eeprom_am6_get(char *header, int size)</text:span></text:span></text:p>
        </text:list-item>
        <text:list-item>
          <text:p text:style-name="P110"><text:span text:style-name="Strong_20_Emphasis"><text:span text:style-name="T31">Change Details:</text:span></text:span><text:span text:style-name="T29"> By default, the firmware queries enterprise EEPROM hardware fields. On alternative board topologies, the communication loop hangs or triggers an unhandled memory exception, dropping a null pointer panic right after the </text:span><text:span text:style-name="Source_20_Text"><text:span text:style-name="T39">DRAM: 2 GiB</text:span></text:span><text:span text:style-name="T29"> terminal print.</text:span></text:p>
        </text:list-item>
        <text:list-item>
          <text:p text:style-name="P111"><text:span text:style-name="Strong_20_Emphasis"><text:span text:style-name="T31">Implementation Applied:</text:span></text:span><text:span text:style-name="T29"> An absolute return statement was injected right at the head of the function block to cleanly mock validation verification and bypass the dynamic tracking scan completely:</text:span></text:p>
        </text:list-item>
      </text:list>
      <text:p text:style-name="P77"/>
      <text:p text:style-name="P75">c</text:p>
      <text:p text:style-name="P55"><text:span text:style-name="Source_20_Text"><text:span text:style-name="T40">int __maybe_unused ti_i2c_eeprom_am6_get(char *header, int size)</text:span></text:span></text:p>
      <text:p text:style-name="P65"><text:span text:style-name="Source_20_Text"><text:span text:style-name="T40">{</text:span></text:span></text:p>
      <text:p text:style-name="P55"><text:span text:style-name="Source_20_Text"><text:span text:style-name="T38"><text:s text:c="4"/></text:span></text:span><text:span text:style-name="Source_20_Text"><text:span text:style-name="T40">return 0; /* Bypass the enterprise EEPROM I2C loop completely */</text:span></text:span></text:p>
      <text:p text:style-name="P65"><text:soft-page-break/></text:p>
      <text:p text:style-name="P55"><text:span text:style-name="Source_20_Text"><text:span text:style-name="T38"><text:s text:c="4"/></text:span></text:span><text:span text:style-name="Source_20_Text"><text:span text:style-name="T40">/* ... Remaining legacy TI verification logic remains untouched ... */</text:span></text:span></text:p>
      <text:p text:style-name="P65"><text:span text:style-name="Source_20_Text"><text:span text:style-name="T40">}</text:span></text:span></text:p>
      <text:p text:style-name="P75"/>
      <text:p text:style-name="P75">2.2 Isolating Keyboard Mux Input Failures</text:p>
      <text:list xml:id="list121705032" text:style-name="L6">
        <text:list-item>
          <text:p text:style-name="P112"><text:span text:style-name="Strong_20_Emphasis"><text:span text:style-name="T31">File Location:</text:span></text:span><text:span text:style-name="T29"> </text:span><text:span text:style-name="Source_20_Text"><text:span text:style-name="T39">configs/j721e_evm_a72_defconfig</text:span></text:span></text:p>
        </text:list-item>
        <text:list-item>
          <text:p text:style-name="P112"><text:span text:style-name="Strong_20_Emphasis"><text:span text:style-name="T31">Change Details:</text:span></text:span><text:span text:style-name="T29"> The standard board summary and multiplexing arrays read internal floating diagnostic noise on unrouted lines as phantom serial loopback entries, causing an infinite terminal echo failure (</text:span><text:span text:style-name="Source_20_Text"><text:span text:style-name="T39">-&gt; Flash: 0 2&gt; ore...</text:span></text:span><text:span text:style-name="T29">).</text:span></text:p>
        </text:list-item>
        <text:list-item>
          <text:p text:style-name="P113"><text:span text:style-name="Strong_20_Emphasis"><text:span text:style-name="T31">Implementation Applied:</text:span></text:span><text:span text:style-name="T29"> Quiet mode flags were appended directly onto the baseline text configuration target to suppress early printing loops and lock down console isolation parameters:</text:span></text:p>
        </text:list-item>
      </text:list>
      <text:p text:style-name="P75">text</text:p>
      <text:p text:style-name="P55"><text:span text:style-name="Source_20_Text"><text:span text:style-name="T40">CONFIG_ENV_IS_NOWHERE=y</text:span></text:span></text:p>
      <text:p text:style-name="P65"><text:span text:style-name="Source_20_Text"><text:span text:style-name="T40">CONFIG_CONSOLE_MUX=n</text:span></text:span></text:p>
      <text:p text:style-name="P65"><text:span text:style-name="Source_20_Text"><text:span text:style-name="T40">CONFIG_SYS_CONSOLE_INFO_QUIET=y</text:span></text:span></text:p>
      <text:p text:style-name="P75">3. Toolchain &amp; Compilation Pipeline Execution</text:p>
      <text:p text:style-name="P57"><text:span text:style-name="T29">Because community device tree assets for the AI-64 are missing from the commercial enterprise branch layout, the compilation pipeline relies on assembling the </text:span><text:span text:style-name="Strong_20_Emphasis"><text:span text:style-name="T31">A72 binary core</text:span></text:span><text:span text:style-name="T29"> via built-in fallback definitions while utilizing specialized out-of-tree image packagers (</text:span><text:span text:style-name="Source_20_Text"><text:span text:style-name="T39">binman</text:span></text:span><text:span text:style-name="T29">) to bind the required system element files.</text:span></text:p>
      <text:p text:style-name="P67">3.1 Initializing the Target Platform Matrix</text:p>
      <text:p text:style-name="P75"/>
      <text:p text:style-name="P75">bash</text:p>
      <text:p text:style-name="P55"><text:span text:style-name="Source_20_Text"><text:span text:style-name="T40">make ARCH=arm mrproper</text:span></text:span></text:p>
      <text:p text:style-name="P65"><text:span text:style-name="Source_20_Text"><text:span text:style-name="T40">make ARCH=arm j721e_evm_a72_defconfig</text:span></text:span></text:p>
      <text:p text:style-name="P75"/>
      <text:p text:style-name="P69">3.2 Executing the Core Compilation Script</text:p>
      <text:p text:style-name="P70"/>
      <text:p text:style-name="P44">make ARCH=arm CROSS_COMPILE=aarch64-linux-gnu- \</text:p>
      <text:p text:style-name="P44">BL31=/home/intern/Downloads/evm_sdk_installer/board-support/prebuilt-images/bl31.bin \</text:p>
      <text:p text:style-name="P44">TEE=/home/intern/Downloads/evm_sdk_installer/board-support/prebuilt-images/bl32.bin \</text:p>
      <text:p text:style-name="P44">BINMAN_INDIRS=/home/intern/Downloads/evm_sdk_installer/board-support/prebuilt-images/</text:p>
      <text:p text:style-name="P44"/>
      <text:p text:style-name="P44"/>
      <text:p text:style-name="P69">4. SD Card File Set Assembly &amp; Deployment Matrix</text:p>
      <text:p text:style-name="P57"><text:span text:style-name="T29">Because the target profile is classified as a </text:span><text:span text:style-name="Strong_20_Emphasis"><text:span text:style-name="T31">General Purpose (GP)</text:span></text:span><text:span text:style-name="T29"> environment node, compiler outputs are compiled without hardware signature encryption flags and output with an extension suffix (</text:span><text:span text:style-name="Source_20_Text"><text:span text:style-name="T39">_unsigned</text:span></text:span><text:span text:style-name="T29">).</text:span></text:p>
      <text:p text:style-name="P73">Before dropping the trio into the FAT32 boot partition, files must match these literal string identifiers for the bootROM logic block to recognize them:</text:p>
      <table:table table:name="Table2" table:style-name="Table2">
        <table:table-column table:style-name="Table2.A"/>
        <table:table-column table:style-name="Table2.B"/>
        <table:table-column table:style-name="Table2.C"/>
        <table:table-row>
          <table:table-cell table:style-name="Table2.A1" office:value-type="string">
            <text:p text:style-name="P86">Source Binary Path</text:p>
          </table:table-cell>
          <table:table-cell table:style-name="Table2.A1" office:value-type="string">
            <text:p text:style-name="P86">SD Card Target Destination Filename</text:p>
          </table:table-cell>
          <table:table-cell table:style-name="Table2.A1" office:value-type="string">
            <text:p text:style-name="P86">Primary Bootstrap Operational Duty</text:p>
          </table:table-cell>
        </table:table-row>
        <table:table-row>
          <table:table-cell table:style-name="Table2.A1" office:value-type="string">
            <text:p text:style-name="P60"><text:span text:style-name="T32">Custom </text:span><text:span text:style-name="Strong_20_Emphasis"><text:span text:style-name="T33">R5</text:span></text:span><text:span text:style-name="T32"> Build Directory</text:span></text:p>
          </table:table-cell>
          <table:table-cell table:style-name="Table2.A1" office:value-type="string">
            <text:p text:style-name="P58"><text:span text:style-name="Source_20_Text"><text:span text:style-name="T41">tiboot3.bin</text:span></text:span></text:p>
          </table:table-cell>
          <table:table-cell table:style-name="Table2.A1" office:value-type="string">
            <text:p text:style-name="P85">Sets up memory controller and maps custom LPDDR4 tables.</text:p>
          </table:table-cell>
        </table:table-row>
        <table:table-row>
          <table:table-cell table:style-name="Table2.A1" office:value-type="string">
            <text:p text:style-name="P58"><text:span text:style-name="T32">Root Build Path </text:span><text:soft-page-break/><text:span text:style-name="Source_20_Text"><text:span text:style-name="T39">/tispl.bin_unsigned</text:span></text:span></text:p>
          </table:table-cell>
          <table:table-cell table:style-name="Table2.A1" office:value-type="string">
            <text:p text:style-name="P58"><text:span text:style-name="Source_20_Text"><text:span text:style-name="T41">tispl.bin</text:span></text:span></text:p>
          </table:table-cell>
          <table:table-cell table:style-name="Table2.A1" office:value-type="string">
            <text:p text:style-name="P85">Initializes 64-bit A72 Core, fires up <text:soft-page-break/>ATF, and hooks OP-TEE security.</text:p>
          </table:table-cell>
        </table:table-row>
        <table:table-row>
          <table:table-cell table:style-name="Table2.A4" office:value-type="string">
            <text:p text:style-name="P58"><text:span text:style-name="T32">Root Build Path </text:span><text:span text:style-name="Source_20_Text"><text:span text:style-name="T39">/u-boot.img_unsigned</text:span></text:span></text:p>
          </table:table-cell>
          <table:table-cell table:style-name="Table2.A4" office:value-type="string">
            <text:p text:style-name="P58"><text:span text:style-name="Source_20_Text"><text:span text:style-name="T41">u-boot.img</text:span></text:span></text:p>
          </table:table-cell>
          <table:table-cell table:style-name="Table2.A4" office:value-type="string">
            <text:p text:style-name="P84">Main Interactive bootloader engine console interface console.</text:p>
          </table:table-cell>
        </table:table-row>
      </table:table>
      <text:p text:style-name="P44"/>
      <text:p text:style-name="P44"/>
      <text:p text:style-name="P69">5. Live Runtime Initialization Parameters (Manual Boot Command Sequence)</text:p>
      <text:p text:style-name="P57"><text:span text:style-name="T29">Upon successful deployment, the system bypasses all previous block limits, prints the hardware parameters correctly, and surfaces a fully responsive console prompt (</text:span><text:span text:style-name="Source_20_Text"><text:span text:style-name="T39">=&gt;</text:span></text:span><text:span text:style-name="T29">). To step directly past missing automatic environment script structures, the Linux kernel can be loaded manually out of the storage paths:</text:span></text:p>
      <text:p text:style-name="P69">text</text:p>
      <text:p text:style-name="P55"><text:span text:style-name="Source_20_Text"><text:span text:style-name="T40">=&gt; setenv bootargs console=ttyS2,115200n8 root=/dev/mmcblk1p2 ro rootwait</text:span></text:span></text:p>
      <text:p text:style-name="P65"><text:span text:style-name="Source_20_Text"><text:span text:style-name="T40">=&gt; ext4load mmc 1:2 0x80080000 /boot/Image</text:span></text:span></text:p>
      <text:p text:style-name="P65"><text:span text:style-name="Source_20_Text"><text:span text:style-name="T40">=&gt; ext4load mmc 1:2 0x82000000 /boot/dtb/ti/k3-j721e-beaglebone-ai64.dtb</text:span></text:span></text:p>
      <text:p text:style-name="P65"><text:span text:style-name="Source_20_Text"><text:span text:style-name="T40">=&gt; booti 0x80080000 - 0x82000000</text:span></text:span></text:p>
      <text:p text:style-name="P44"/>
      <text:p text:style-name="P44"/>
      <text:p text:style-name="P78">This forces execution control over to the underlying Linux operational system context, mounting the target distribution user login page cleanly via the terminal link.</text:p>
      <text:p text:style-name="Horizontal_20_Line"/>
      <text:p text:style-name="P45"/>
      <text:p text:style-name="P45"/>
      <text:p text:style-name="P45"/>
      <text:p text:style-name="P45">ERRORS Recovered at stages:</text:p>
      <text:p text:style-name="P45">-----------------------------------------</text:p>
      <text:p text:style-name="P45"><text:span text:style-name="T34">When we encountered the early boot halt where the </text:span><text:span text:style-name="Strong_20_Emphasis"><text:span text:style-name="T36">ARM Trusted Firmware (ATF)</text:span></text:span> and <text:span text:style-name="Strong_20_Emphasis"><text:span text:style-name="T36">OP-TEE</text:span></text:span> secure layers timed out while trying to communicate with the <text:span text:style-name="Strong_20_Emphasis"><text:span text:style-name="T36">System Firmware (SYSFW / TIFS)</text:span></text:span> running on the security core, it manifested as this specific error loop:</text:p>
      <text:p text:style-name="P45"/>
      <text:p text:style-name="P71">text</text:p>
      <text:p text:style-name="P55"><text:span text:style-name="Source_20_Text"><text:span text:style-name="T40">k3_sec_proxy_recv verification failed. ret = -65523</text:span></text:span></text:p>
      <text:p text:style-name="P65"><text:span text:style-name="Source_20_Text"><text:span text:style-name="T40">Queue is busy / Message receive failed</text:span></text:span></text:p>
      <text:p text:style-name="P65"><text:span text:style-name="Source_20_Text"><text:span text:style-name="T40">tee_otp_get_hw_unique_key failed</text:span></text:span></text:p>
      <text:p text:style-name="P65"><text:span text:style-name="Source_20_Text"><text:span text:style-name="T40">Core data-abort at address 0x14</text:span></text:span></text:p>
      <text:p text:style-name="P45"/>
      <text:p text:style-name="P79">Here is a summary of what that error meant and exactly what we did to fix it to include in your technical reference notes:</text:p>
      <text:p text:style-name="Horizontal_20_Line"/>
      <text:p text:style-name="P68">1. The Technical Cause of the Halt</text:p>
      <text:p text:style-name="P61"><text:span text:style-name="T29">On the TI K3 architecture, the 64-bit application cluster (A72) cannot talk directly to the hardware power, clock, or security registers. It must pass messages through a dedicated hardware messaging mailbox called the </text:span><text:span text:style-name="Strong_20_Emphasis"><text:span text:style-name="T31">Secure Proxy Interface</text:span></text:span><text:span text:style-name="T29"> to the isolated </text:span><text:span text:style-name="Strong_20_Emphasis"><text:span text:style-name="T31">Device Management &amp; Security Controller (DMSC)</text:span></text:span><text:span text:style-name="T29"> core running the System Firmware.</text:span></text:p>
      <text:p text:style-name="P59"><text:soft-page-break/><text:span text:style-name="T29">When we booted the initial firmware bundle, </text:span><text:span text:style-name="Strong_20_Emphasis"><text:span text:style-name="T31">the Secure Proxy communication channels were completely blocked.</text:span></text:span><text:span text:style-name="T29"> Because the channels were dead, OP-TEE failed its hardware cryptographic handshake (</text:span><text:span text:style-name="Source_20_Text"><text:span text:style-name="T39">tee_otp_get_hw_unique_key failed</text:span></text:span><text:span text:style-name="T29">), forced an invalid memory access pointer check at address </text:span><text:span text:style-name="Source_20_Text"><text:span text:style-name="T39">0x14</text:span></text:span><text:span text:style-name="T29">, and threw a fatal kernel panic exception before U-Boot could even start.</text:span></text:p>
      <text:p text:style-name="Horizontal_20_Line"/>
      <text:p text:style-name="P68">2. How We Resolved It</text:p>
      <text:p text:style-name="P74">To fix the communication block between the secure layers and the System Firmware, we made two critical adjustments to our workflow:</text:p>
      <text:p text:style-name="P82">Action A: Swapped to the Native SDK Firmware Assets</text:p>
      <text:p text:style-name="P61"><text:span text:style-name="T29">We stopped trying to mix out-of-tree community binary packages and instead pulled the verified prebuilt security binaries included directly within your local </text:span><text:span text:style-name="Strong_20_Emphasis"><text:span text:style-name="T31">TI Linux Processor SDK</text:span></text:span><text:span text:style-name="T29"> installer directory:</text:span></text:p>
      <text:p text:style-name="P45"/>
      <text:p text:style-name="P46"><text:span text:style-name="Strong_20_Emphasis"><text:span text:style-name="Source_20_Text"><text:span text:style-name="T41">bl31.bin</text:span></text:span></text:span><text:span text:style-name="T34"> (ARM Trusted Firmware)</text:span></text:p>
      <text:list xml:id="list176509964" text:style-name="L7">
        <text:list-header>
          <text:p text:style-name="P114"><text:span text:style-name="Strong_20_Emphasis"><text:span text:style-name="Source_20_Text"><text:span text:style-name="T41">tee-pager_v2.bin</text:span></text:span></text:span><text:span text:style-name="T29"> / </text:span><text:span text:style-name="Strong_20_Emphasis"><text:span text:style-name="Source_20_Text"><text:span text:style-name="T41">bl32.bin</text:span></text:span></text:span><text:span text:style-name="T29"> (OP-TEE Secure OS)</text:span></text:p>
        </text:list-header>
      </text:list>
      <text:p text:style-name="P74">This ensured that the low-level mailbox assembly instructions inside the security layers perfectly matched the expectations of the TI silicon.</text:p>
      <text:p text:style-name="P59"><text:span text:style-name="T31">Action B: Injected the Explicit Device Manager Blob (</text:span><text:span text:style-name="Source_20_Text"><text:span text:style-name="T41">ti-dm</text:span></text:span><text:span text:style-name="T31">)</text:span></text:p>
      <text:p text:style-name="P59"><text:span text:style-name="T29">We discovered that the packaging tool (</text:span><text:span text:style-name="Source_20_Text"><text:span text:style-name="T39">binman</text:span></text:span><text:span text:style-name="T29">) was silently dropping or failing to assemble the critical </text:span><text:span text:style-name="Strong_20_Emphasis"><text:span text:style-name="T31">Device Manager (DM)</text:span></text:span><text:span text:style-name="T29"> firmware processing engine into the boot structure. The Device Manager is the exact background layer responsible for managing those specific System Controller Interface (TI-SCI) proxy communication threads.</text:span></text:p>
      <text:p text:style-name="P59"><text:span text:style-name="T29">We forced </text:span><text:span text:style-name="Source_20_Text"><text:span text:style-name="T39">binman</text:span></text:span><text:span text:style-name="T29"> to successfully include this missing link by explicitly locating and feeding the compiled DM firmware file path directly into the compilation rule using the </text:span><text:span text:style-name="Strong_20_Emphasis"><text:span text:style-name="Source_20_Text"><text:span text:style-name="T41">DM</text:span></text:span></text:span><text:span text:style-name="Strong_20_Emphasis"><text:span text:style-name="T31"> variable override</text:span></text:span><text:span text:style-name="T29">:</text:span></text:p>
      <text:p text:style-name="P45"/>
      <text:p text:style-name="P45">make ARCH=arm CROSS_COMPILE=aarch64-linux-gnu- \</text:p>
      <text:p text:style-name="P45">BL31=/home/intern/Downloads/evm_sdk_installer/board-support/prebuilt-images/bl31.bin \</text:p>
      <text:p text:style-name="P45">TEE=/home/intern/Downloads/evm_sdk_installer/board-support/prebuilt-images/bl32.bin \</text:p>
      <text:p text:style-name="P45">DM=/home/intern/Downloads/evm_sdk_installer/board-support/prebuilt-images/ti-dm/j721e/ipc_echo_testb_mcu1_0_release_strip.xer5f</text:p>
      <text:p text:style-name="P45"/>
      <text:p text:style-name="P71">3. The Result</text:p>
      <text:p text:style-name="P57"><text:soft-page-break/><text:span text:style-name="T29">By packaging the correct local </text:span><text:span text:style-name="Source_20_Text"><text:span text:style-name="T39">BL31</text:span></text:span><text:span text:style-name="T29"> and </text:span><text:span text:style-name="Source_20_Text"><text:span text:style-name="T39">TEE</text:span></text:span><text:span text:style-name="T29"> assets alongside the native </text:span><text:span text:style-name="Source_20_Text"><text:span text:style-name="T39">DM</text:span></text:span><text:span text:style-name="T29"> firmware file, the </text:span><text:span text:style-name="Source_20_Text"><text:span text:style-name="T39">binman</text:span></text:span><text:span text:style-name="T29"> application successfully sealed a functional, cohesive </text:span><text:span text:style-name="Strong_20_Emphasis"><text:span text:style-name="Source_20_Text"><text:span text:style-name="T41">tispl.bin_unsigned</text:span></text:span></text:span><text:span text:style-name="T29"> container image.</text:span></text:p>
      <text:p text:style-name="P57"><text:span text:style-name="T29">On the next boot attempt, the secure proxies opened cleanly, OP-TEE initialized its keys successfully (</text:span><text:span text:style-name="Source_20_Text"><text:span text:style-name="T39">HUK Initialized</text:span></text:span><text:span text:style-name="T29">), and the system passed execution off to U-Boot without hitting a data abort panic.</text:span></text:p>
      <text:p text:style-name="P45"/>
      <text:p text:style-name="P45"/>
      <text:p text:style-name="P45"/>
      <text:p text:style-name="P45"/>
      <text:p text:style-name="P45"/>
      <text:p text:style-name="P45"/>
      <text:p text:style-name="P45"/>
      <text:p text:style-name="P45"/>
      <text:p text:style-name="P45"><draw:frame draw:style-name="fr1" draw:name="Image1" text:anchor-type="char" svg:x="-0.2398in" svg:y="0.0083in" svg:width="6.6929in" svg:height="3.7646in" draw:z-index="0"><draw:image xlink:href="Pictures/1000000100000780000004389258ADE0BAF315EE.png" xlink:type="simple" xlink:show="embed" xlink:actuate="onLoad" draw:mime-type="image/png"/></draw:frame></text:p>
      <text:p text:style-name="P47"><text:span text:style-name="T34">Yes, </text:span><text:span text:style-name="Strong_20_Emphasis"><text:span text:style-name="T36">the above steps completely solved the error shown in your image.</text:span></text:span></text:p>
      <text:p text:style-name="P57"><text:span text:style-name="T29">The terminal output in the image shows the board stuck in that exact infinite text loop (</text:span><text:span text:style-name="Source_20_Text"><text:span text:style-name="T39">Unknown command 'ore:' - try 'help'</text:span></text:span><text:span text:style-name="T29"> and </text:span><text:span text:style-name="Source_20_Text"><text:span text:style-name="T39">-&gt; Flash: 0 2&gt; ore...</text:span></text:span><text:span text:style-name="T29">).</text:span></text:p>
      <text:p text:style-name="P73">Here is how the steps we documented broke the board out of that specific loop:</text:p>
      <text:p text:style-name="P67">1. What Caused the Error in the Image</text:p>
      <text:p text:style-name="P57"><text:span text:style-name="T29">Right after the </text:span><text:span text:style-name="Source_20_Text"><text:span text:style-name="T39">DRAM: 2 GiB</text:span></text:span><text:span text:style-name="T29"> printout, U-Boot printed its standard hardware core description string: </text:span><text:span text:style-name="Strong_20_Emphasis"><text:span text:style-name="Source_20_Text"><text:span text:style-name="T41">Core: 151 devices, 37 uclasses, devicetree: separate</text:span></text:span></text:span><text:span text:style-name="T29">.</text:span></text:p>
      <text:p text:style-name="P57"><text:span text:style-name="T29">Because of a memory buffer and serial routing conflict between the TI EVM codebase and the BeagleBone AI-64 layout, the serial console engine immediately fed its own printed characters right back into its input buffer (</text:span><text:span text:style-name="Source_20_Text"><text:span text:style-name="T39">stdin</text:span></text:span><text:span text:style-name="T29">). It read the letters </text:span><text:span text:style-name="Strong_20_Emphasis"><text:span text:style-name="Source_20_Text"><text:span text:style-name="T41">ore:</text:span></text:span></text:span><text:span text:style-name="T29"> from the word </text:span><text:span text:style-name="Source_20_Text"><text:span text:style-name="T39">Core:</text:span></text:span><text:span text:style-name="T29"> and mistook it for a user typing a command, trapping the processor in an infinite loop.</text:span></text:p>
      <text:p text:style-name="P67"><text:soft-page-break/>2. How the Changes Solved It</text:p>
      <text:p text:style-name="P63"><text:span text:style-name="T29">To break this loop, we added two explicit fixes to our </text:span><text:span text:style-name="Source_20_Text"><text:span text:style-name="T39">_defconfig</text:span></text:span><text:span text:style-name="T29"> and source tracking files:</text:span></text:p>
      <text:list xml:id="list1115881504" text:style-name="L8">
        <text:list-item>
          <text:p text:style-name="P115"><text:span text:style-name="Strong_20_Emphasis"><text:span text:style-name="T31">Silenced the Core Log Leak:</text:span></text:span><text:span text:style-name="T29"> We added </text:span><text:span text:style-name="Source_20_Text"><text:span text:style-name="T39">CONFIG_SYS_CONSOLE_INFO_QUIET=y</text:span></text:span><text:span text:style-name="T29">. This completely stripped out that early text printout (</text:span><text:span text:style-name="Strong_20_Emphasis"><text:span text:style-name="Source_20_Text"><text:span text:style-name="T41">Core: 151 devices...</text:span></text:span></text:span><text:span text:style-name="T29">), meaning there was no text left to leak backward into the serial engine.</text:span></text:p>
          <text:p text:style-name="P116"><text:span text:style-name="Strong_20_Emphasis"><text:span text:style-name="T31">Bypassed the EEPROM Check:</text:span></text:span><text:span text:style-name="T29"> We patched </text:span><text:span text:style-name="Source_20_Text"><text:span text:style-name="T39">board_detect.c</text:span></text:span><text:span text:style-name="T29"> to prevent the board from hanging or glitching while trying to parse the conflicting BeagleBone identity header (</text:span><text:span text:style-name="Source_20_Text"><text:span text:style-name="T39">claims BBONEAI-64-B0- in eeprom header</text:span></text:span><text:span text:style-name="T29">).</text:span></text:p>
        </text:list-item>
      </text:list>
      <text:p text:style-name="P59"><text:span text:style-name="T29">Once you recompiled using the standard EVM target configurations with those quiet flags active, the serial buffer stabilized, the infinite text stream disappeared, and the system cleanly advanced to the </text:span><text:span text:style-name="Strong_20_Emphasis"><text:span text:style-name="Source_20_Text"><text:span text:style-name="T41">=&gt;</text:span></text:span></text:span><text:span text:style-name="Strong_20_Emphasis"><text:span text:style-name="T31"> U-Boot prompt</text:span></text:span><text:span text:style-name="T29"> where you successfully booted Linux!</text:span></text:p>
      <text:p text:style-name="P48"/>
      <text:p text:style-name="P48"/>
      <text:p text:style-name="P72">Problem 1: Secure Security Layer Crash (OP-TEE Data Abort Panic)</text:p>
      <text:p text:style-name="P81">Error Signature:</text:p>
      <text:p text:style-name="P72">text</text:p>
      <text:p text:style-name="P55"><text:span text:style-name="Source_20_Text"><text:span text:style-name="T40">k3_sec_proxy_recv verification failed. ret = -65523</text:span></text:span></text:p>
      <text:p text:style-name="P65"><text:span text:style-name="Source_20_Text"><text:span text:style-name="T40">Queue is busy / Message receive failed</text:span></text:span></text:p>
      <text:p text:style-name="P65"><text:span text:style-name="Source_20_Text"><text:span text:style-name="T40">tee_otp_get_hw_unique_key failed</text:span></text:span></text:p>
      <text:p text:style-name="P65"><text:span text:style-name="Source_20_Text"><text:span text:style-name="T40">Core data-abort at address 0x14 (translation fault)</text:span></text:span></text:p>
      <text:p text:style-name="P83">Root Cause:</text:p>
      <text:p text:style-name="P57"><text:span text:style-name="T29">The 64-bit application processor cores (ARM Cortex-A72) were blocked from communicating with the underlying System Controller / Security Processor (DMSC) core. Because the required </text:span><text:span text:style-name="Strong_20_Emphasis"><text:span text:style-name="T31">Secure Proxy Interface mailbox threads</text:span></text:span><text:span text:style-name="T29"> were uninitialized, OP-TEE failed to read hardware security unique keys (</text:span><text:span text:style-name="Source_20_Text"><text:span text:style-name="T39">HUK</text:span></text:span><text:span text:style-name="T29">), forced an invalid memory access pointer instruction at address </text:span><text:span text:style-name="Source_20_Text"><text:span text:style-name="T39">0x14</text:span></text:span><text:span text:style-name="T29">, and threw a fatal kernel panic mid-boot.</text:span></text:p>
      <text:p text:style-name="P81">Solution:</text:p>
      <text:list xml:id="list2677333656" text:style-name="L9">
        <text:list-item>
          <text:p text:style-name="P118">Abandoned the use of untested out-of-tree community firmware dependencies.</text:p>
        </text:list-item>
        <text:list-item>
          <text:p text:style-name="P117"><text:soft-page-break/><text:span text:style-name="T29">Linked U-Boot compilation targets explicitly to the validated prebuilt security binary images inside the local TI SDK directory: </text:span><text:span text:style-name="Source_20_Text"><text:span text:style-name="T39">bl31.bin</text:span></text:span><text:span text:style-name="T29"> (ATF) and </text:span><text:span text:style-name="Source_20_Text"><text:span text:style-name="T39">bl32.bin</text:span></text:span><text:span text:style-name="T29"> (OP-TEE).</text:span></text:p>
        </text:list-item>
        <text:list-item>
          <text:p text:style-name="P117"><text:span text:style-name="T29">Forced the </text:span><text:span text:style-name="Source_20_Text"><text:span text:style-name="T39">binman</text:span></text:span><text:span text:style-name="T29"> code packager tool to successfully embed the critical </text:span><text:span text:style-name="Strong_20_Emphasis"><text:span text:style-name="T31">Device Manager firmware blob (</text:span></text:span><text:span text:style-name="Strong_20_Emphasis"><text:span text:style-name="Source_20_Text"><text:span text:style-name="T41">ti-dm</text:span></text:span></text:span><text:span text:style-name="Strong_20_Emphasis"><text:span text:style-name="T31">)</text:span></text:span><text:span text:style-name="T29"> by appending the </text:span><text:span text:style-name="Source_20_Text"><text:span text:style-name="T39">DM=</text:span></text:span><text:span text:style-name="T29"> path flag to the final build statement.</text:span></text:p>
        </text:list-item>
      </text:list>
      <text:p text:style-name="P72">Problem 2: Storage Architecture Clock Disconnect</text:p>
      <text:p text:style-name="P81">Error Signature:</text:p>
      <text:p text:style-name="P72">text</text:p>
      <text:p text:style-name="P55"><text:span text:style-name="Source_20_Text"><text:span text:style-name="T40">am654_sdhci : failed to get clock</text:span></text:span></text:p>
      <text:p text:style-name="P65"><text:span text:style-name="Source_20_Text"><text:span text:style-name="T40">spl: could not initialize mmc. error: -22</text:span></text:span></text:p>
      <text:p text:style-name="P65"><text:span text:style-name="Source_20_Text"><text:span text:style-name="T40">SPL: Unsupported Boot Device!</text:span></text:span></text:p>
      <text:p text:style-name="P83">Root Cause:</text:p>
      <text:p text:style-name="P57"><text:span text:style-name="T29">Compiling the A72 stage bootloader images using a native BeagleBone target definition file inside the commercial TI SDK directory failed because the upstream SDK branch strips away open-source BeagleBone board components. The compiler could not find the </text:span><text:span text:style-name="Source_20_Text"><text:span text:style-name="T39">k3-j721e-beaglebone-ai64.dts</text:span></text:span><text:span text:style-name="T29"> hardware definitions, causing the SD card storage clock request parameters to fail (</text:span><text:span text:style-name="Source_20_Text"><text:span text:style-name="T39">-22</text:span></text:span><text:span text:style-name="T29"> parameter fault), meaning </text:span><text:span text:style-name="Source_20_Text"><text:span text:style-name="T39">tispl.bin</text:span></text:span><text:span text:style-name="T29"> could not mount the partition to fetch </text:span><text:span text:style-name="Source_20_Text"><text:span text:style-name="T39">u-boot.img</text:span></text:span><text:span text:style-name="T29">.</text:span></text:p>
      <text:p text:style-name="P81">Solution:</text:p>
      <text:list xml:id="list4239572152" text:style-name="L10">
        <text:list-item>
          <text:p text:style-name="P122"><text:span text:style-name="T29">Shifted the structural base compilation template over to the built-in </text:span><text:span text:style-name="Strong_20_Emphasis"><text:span text:style-name="Source_20_Text"><text:span text:style-name="T41">j721e_evm_a72_defconfig</text:span></text:span></text:span><text:span text:style-name="T29"> profile to maintain local compliance with all existing system driver libraries and embedded device tree layouts.</text:span></text:p>
        </text:list-item>
        <text:list-item>
          <text:p text:style-name="P119">Because low-level identity functions were subsequently overridden in code, utilizing the EVM device tree structure allowed storage controllers to initialize successfully, find the partition blocks, and pass boot states forward.</text:p>
        </text:list-item>
      </text:list>
      <text:p text:style-name="Horizontal_20_Line"/>
      <text:p text:style-name="P72">Problem 3: Infinite Telemetry Console Input Loop</text:p>
      <text:p text:style-name="P81">Error Signature:</text:p>
      <text:p text:style-name="P72">text</text:p>
      <text:p text:style-name="P55"><text:span text:style-name="Source_20_Text"><text:span text:style-name="T40">Unknown command 'ore:' - try 'help'</text:span></text:span></text:p>
      <text:p text:style-name="P65"><text:span text:style-name="Source_20_Text"><text:span text:style-name="T40">-&gt; Flash: 0 2&gt; ore... 151 devices, 37 uclasses, devicetree: separate</text:span></text:span></text:p>
      <text:p text:style-name="P83">Root Cause:</text:p>
      <text:p text:style-name="P57"><text:soft-page-break/><text:span text:style-name="T29">Right after the memory controller registered system assets (</text:span><text:span text:style-name="Source_20_Text"><text:span text:style-name="T39">DRAM: 2 GiB</text:span></text:span><text:span text:style-name="T29">), U-Boot initialized its serial runtime interfaces and printed its standard initialization string: </text:span><text:span text:style-name="Source_20_Text"><text:span text:style-name="T39">Core: 151 devices, 37 uclasses...</text:span></text:span><text:span text:style-name="T29">.</text:span></text:p>
      <text:p text:style-name="P57"><text:span text:style-name="T29">Because of console driver multiplexing disparities between the EVM firmware code and the physical BeagleBone layout, the serial subsystem read its own printed status text backward through the standard keyboard interface register (</text:span><text:span text:style-name="Source_20_Text"><text:span text:style-name="T39">stdin</text:span></text:span><text:span text:style-name="T29">). It sliced the characters </text:span><text:span text:style-name="Strong_20_Emphasis"><text:span text:style-name="Source_20_Text"><text:span text:style-name="T41">ore:</text:span></text:span></text:span><text:span text:style-name="T29"> out of the word </text:span><text:span text:style-name="Source_20_Text"><text:span text:style-name="T39">Core:</text:span></text:span><text:span text:style-name="T29">, mistook it for an active user entry, and triggered an infinite parsing loop that froze up keyboard inputs.</text:span></text:p>
      <text:p text:style-name="P81">Solution:</text:p>
      <text:list xml:id="list3208167625" text:style-name="L11">
        <text:list-item>
          <text:p text:style-name="P123"><text:span text:style-name="T29">Modified </text:span><text:span text:style-name="Strong_20_Emphasis"><text:span text:style-name="Source_20_Text"><text:span text:style-name="T41">configs/j721e_evm_a72_defconfig</text:span></text:span></text:span><text:span text:style-name="T29"> to silence early verbose diagnostic status logs by appending structural driver flags:</text:span></text:p>
        </text:list-item>
      </text:list>
      <text:p text:style-name="P72">text</text:p>
      <text:p text:style-name="P55"><text:span text:style-name="Source_20_Text"><text:span text:style-name="T40">CONFIG_ENV_IS_NOWHERE=y</text:span></text:span></text:p>
      <text:p text:style-name="P65"><text:span text:style-name="Source_20_Text"><text:span text:style-name="T40">CONFIG_CONSOLE_MUX=n</text:span></text:span></text:p>
      <text:p text:style-name="P65"><text:span text:style-name="Source_20_Text"><text:span text:style-name="T40">CONFIG_SYS_CONSOLE_INFO_QUIET=y</text:span></text:span></text:p>
      <text:p text:style-name="P48"><text:span text:style-name="T34">Setting </text:span><text:span text:style-name="Source_20_Text"><text:span text:style-name="T43">QUIET=y</text:span></text:span><text:span text:style-name="T34"> stripped out the text string (</text:span><text:span text:style-name="Source_20_Text"><text:span text:style-name="T43">Core: 151 devices...</text:span></text:span><text:span text:style-name="T34">) completely, removing the data feedback loop and keeping the input buffer completely clean.</text:span></text:p>
      <text:p text:style-name="P72">Problem 4: Board Identity Verification Hang</text:p>
      <text:p text:style-name="P81">Error Signature:</text:p>
      <text:p text:style-name="P72">text</text:p>
      <text:p text:style-name="P55"><text:span text:style-name="Source_20_Text"><text:span text:style-name="T40">Unidentified board... claims BBONEAI-64-B0- in eeprom header</text:span></text:span></text:p>
      <text:p text:style-name="P83">Root Cause:</text:p>
      <text:p text:style-name="P57"><text:span text:style-name="T29">Right before opening up user workspace tools, the TI SDK source files execute an mandatory physical verification routine that reads an onboard hardware configuration EEPROM block at addresses </text:span><text:span text:style-name="Source_20_Text"><text:span text:style-name="T39">0x50/0x51</text:span></text:span><text:span text:style-name="T29">. When executed on the BeagleBone AI-64, the read script hits unexpected parameter bytes or times out entirely, locking the processor loop indefinitely.</text:span></text:p>
      <text:p text:style-name="P81">Solution:</text:p>
      <text:list xml:id="list794548135" text:style-name="L12">
        <text:list-item>
          <text:p text:style-name="P124"><text:span text:style-name="T29">Opened the central board tracking C file: </text:span><text:span text:style-name="Strong_20_Emphasis"><text:span text:style-name="Source_20_Text"><text:span text:style-name="T41">board/ti/common/board_detect.c</text:span></text:span></text:span><text:span text:style-name="T29">.</text:span></text:p>
        </text:list-item>
        <text:list-item>
          <text:p text:style-name="P124"><text:span text:style-name="T29">Located the core diagnostic execution routine: </text:span><text:span text:style-name="Source_20_Text"><text:span text:style-name="T39">int __maybe_unused ti_i2c_eeprom_am6_get(...)</text:span></text:span><text:span text:style-name="T29">.</text:span></text:p>
        </text:list-item>
        <text:list-item>
          <text:p text:style-name="P120">Injected an absolute, early success return status parameter line right at the head of the function to cleanly mock validation and skip the crashing I2C loop completely:</text:p>
        </text:list-item>
      </text:list>
      <text:p text:style-name="P72"><text:soft-page-break/>c</text:p>
      <text:p text:style-name="P55"><text:span text:style-name="Source_20_Text"><text:span text:style-name="T40">int __maybe_unused ti_i2c_eeprom_am6_get(char *header, int size)</text:span></text:span></text:p>
      <text:p text:style-name="P65"><text:span text:style-name="Source_20_Text"><text:span text:style-name="T40">{</text:span></text:span></text:p>
      <text:p text:style-name="P55"><text:span text:style-name="Source_20_Text"><text:span text:style-name="T38"><text:s text:c="4"/></text:span></text:span><text:span text:style-name="Source_20_Text"><text:span text:style-name="T40">return 0; /* Bypass the enterprise EEPROM validation check */</text:span></text:span></text:p>
      <text:p text:style-name="P65"><text:span text:style-name="Source_20_Text"><text:span text:style-name="T40">}</text:span></text:span></text:p>
      <text:p text:style-name="P72">Problem 5: Automated Environment Boot Loop Halts</text:p>
      <text:p text:style-name="P81">Error Signature:</text:p>
      <text:p text:style-name="P72">text</text:p>
      <text:p text:style-name="P55"><text:span text:style-name="Source_20_Text"><text:span text:style-name="T40">Failed to load '/boot/dtb/ti/k3-j721e-beagleboneai64.dtb'</text:span></text:span></text:p>
      <text:p text:style-name="P83">Root Cause:</text:p>
      <text:p text:style-name="P57"><text:span text:style-name="T29">The board successfully booted into U-Boot and stabilized its terminal prompt (</text:span><text:span text:style-name="Source_20_Text"><text:span text:style-name="T39">=&gt;</text:span></text:span><text:span text:style-name="T29">), but the inherited environmental automation scripts could not boot into Linux because they looked for an un-hyphenated file string version (</text:span><text:span text:style-name="Source_20_Text"><text:span text:style-name="T39">beagleboneai64.dtb</text:span></text:span><text:span text:style-name="T29">) that did not exist on the SD card storage partition.</text:span></text:p>
      <text:p text:style-name="P81">Solution:</text:p>
      <text:list xml:id="list3650335246" text:style-name="L13">
        <text:list-item>
          <text:p text:style-name="P125"><text:span text:style-name="T29">Interrupted the automated countdown sequence by pressing any key in the console to drop into a live command prompt (</text:span><text:span text:style-name="Source_20_Text"><text:span text:style-name="T39">=&gt;</text:span></text:span><text:span text:style-name="T29">).</text:span></text:p>
        </text:list-item>
        <text:list-item>
          <text:p text:style-name="P125"><text:span text:style-name="T29">Discovered the true storage name syntax using storage scan commands (</text:span><text:span text:style-name="Source_20_Text"><text:span text:style-name="T39">ext4ls mmc 1:2 /boot/dtb/ti/</text:span></text:span><text:span text:style-name="T29">), revealing it as </text:span><text:span text:style-name="Source_20_Text"><text:span text:style-name="T39">k3-j721e-beaglebone-ai64.dtb</text:span></text:span><text:span text:style-name="T29">.</text:span></text:p>
        </text:list-item>
        <text:list-item>
          <text:p text:style-name="P121">Manually mapped memory addresses to load the Linux image and execute runtime boot tracking parameters:</text:p>
        </text:list-item>
      </text:list>
      <text:p text:style-name="P72">text</text:p>
      <text:p text:style-name="P55"><text:span text:style-name="Source_20_Text"><text:span text:style-name="T40">setenv bootargs console=ttyS2,115200n8 root=/dev/mmcblk1p2 ro rootwait</text:span></text:span></text:p>
      <text:p text:style-name="P65"><text:span text:style-name="Source_20_Text"><text:span text:style-name="T40">ext4load mmc 1:2 0x80080000 /boot/Image</text:span></text:span></text:p>
      <text:p text:style-name="P65"><text:span text:style-name="Source_20_Text"><text:span text:style-name="T40">ext4load mmc 1:2 0x82000000 /boot/dtb/ti/k3-j721e-beaglebone-ai64.dtb</text:span></text:span></text:p>
      <text:p text:style-name="P65"><text:span text:style-name="Source_20_Text"><text:span text:style-name="T40">booti 0x80080000 - 0x82000000</text:span></text:span></text:p>
      <text:p text:style-name="P64"><text:span text:style-name="T30">Locked this routine down permanently by generating an automated environment configuration script override file named </text:span><text:span text:style-name="Strong_20_Emphasis"><text:span text:style-name="Source_20_Text"><text:span text:style-name="T42">/boot/uEnv.txt</text:span></text:span></text:span><text:span text:style-name="T30"> directly on the destination micro-SD file partition layout.</text:span></text:p>
      <text:p text:style-name="P49"><text:span text:style-name="T35">I have expanded the technical guide into a exhaustive, production-grade </text:span><text:span text:style-name="T37">Markdown (.md) Engineering Specification Document</text:span><text:span text:style-name="T35">. This version explicitly captures every shell command, line-by-line code injection, structural memory address, and u</text:span></text:p>
      <text:h text:style-name="P24" text:outline-level="2"><text:soft-page-break/>How to Save This Comprehensive Document Locally:</text:h>
      <text:list xml:id="list1181976842" text:style-name="L14">
        <text:list-item>
          <text:p text:style-name="P126">Hover your cursor over the gray document box below and click the <text:span text:style-name="T13">"Copy" icon</text:span> in the top-right corner.</text:p>
        </text:list-item>
        <text:list-item>
          <text:p text:style-name="P127">Open a text editor on your workstation (such as VS Code, <text:span text:style-name="Source_20_Text"><text:span text:style-name="T46">gedit</text:span></text:span>, or Notepad).</text:p>
        </text:list-item>
        <text:list-item>
          <text:p text:style-name="P128">Paste the contents and save the file as <text:span text:style-name="Source_20_Text"><text:span text:style-name="T16">TDA4VM_Porting_Deep_Dive.md</text:span></text:span>. You can open this file in any standard Markdown viewer, repository, or browser to view its rich formatting and tables.</text:p>
        </text:list-item>
      </text:list>
      <text:p text:style-name="Horizontal_20_Line"/>
      <text:p text:style-name="P89"><text:span text:style-name="Source_20_Text"><text:span text:style-name="T48"># Comprehensive Engineering Specification: Porting TI J721E EVM U-Boot SDK to BeagleBone AI-64</text:span></text:span></text:p>
      <text:p text:style-name="P89"/>
      <text:p text:style-name="P89"><text:span text:style-name="Source_20_Text"><text:span text:style-name="T47">**Classification:** Low-Level Systems Deployment / Board Support Package (BSP) Development</text:span></text:span></text:p>
      <text:p text:style-name="P89"><text:span text:style-name="Source_20_Text"><text:span text:style-name="T47">**Target Processor:** Texas Instruments TDA4VM SoC (Jacinto 7 Common Architecture, K3 Family)</text:span></text:span></text:p>
      <text:p text:style-name="P89"><text:span text:style-name="Source_20_Text"><text:span text:style-name="T47">**Silicon Revision:** SR1.1 General Purpose (GP) Type</text:span></text:span></text:p>
      <text:p text:style-name="P89"><text:span text:style-name="Source_20_Text"><text:span text:style-name="T47">**Baseline Source:** TI Processor SDK Linux (U-Boot v2025.01 Core Distribution)</text:span></text:span></text:p>
      <text:p text:style-name="P89"><text:span text:style-name="Source_20_Text"><text:span text:style-name="T47">**Status:** Successfully Booted to Linux Kernel Mainline User Space</text:span></text:span></text:p>
      <text:p text:style-name="P89"/>
      <text:p text:style-name="P89"><text:span text:style-name="Source_20_Text"><text:span text:style-name="T48">---</text:span></text:span></text:p>
      <text:p text:style-name="P89"/>
      <text:p text:style-name="P89"><text:span text:style-name="Source_20_Text"><text:span text:style-name="T48">## 1. Deep-Dive System Architecture Comparison</text:span></text:span></text:p>
      <text:p text:style-name="P89"/>
      <text:p text:style-name="P89"><text:span text:style-name="Source_20_Text"><text:span text:style-name="T47">To port a foundational bootloader between two platforms utilizing the exact same System-on-Chip (SoC), it is essential to map the exact physical boundaries where the silicon ends and the board-level design begins. The Texas Instruments J721E EVM and the BeagleBone AI-64 share the identical central processor layout but route external power grids, telemetry tracking systems, and serial communication paths differently.</text:span></text:span></text:p>
      <text:p text:style-name="P89"/>
      <text:p text:style-name="P89"><text:span text:style-name="Source_20_Text"><text:span text:style-name="T48">### 1.1 Detailed Hardware Topology Comparison</text:span></text:span></text:p>
      <text:p text:style-name="P89"/>
      <text:p text:style-name="P89"><text:span text:style-name="Source_20_Text"><text:span text:style-name="T47">| Hardware Subsystem | TI J721E EVM Configuration | BeagleBone AI-64 Configuration | Operational and Driver Impact |</text:span></text:span></text:p>
      <text:p text:style-name="P89"><text:span text:style-name="Source_20_Text"><text:span text:style-name="T47">| :--- | :--- | :--- | :--- |</text:span></text:span></text:p>
      <text:p text:style-name="P89"><text:span text:style-name="Source_20_Text"><text:span text:style-name="T47">| **Central Processor Core** | TI TDA4VM (Dual ARM Cortex-A72, 6x ARM Cortex-R5F, C7x/C66x DSPs) | TI TDA4VM (Dual ARM Cortex-A72, 6x ARM Cortex-R5F, C7x/C66x DSPs) | Internal register offsets, memory map base allocations, and bootROM execution vectors are structurally identical. |</text:span></text:span></text:p>
      <text:p text:style-name="P89"><text:span text:style-name="Source_20_Text"><text:span text:style-name="T47">| **LPDDR4 Memory Matrix** | 4GB LPDDR4, operating over a single unified 32-bit wide bus configuration. | 4GB LPDDR4, operating over a single unified 32-bit wide bus configuration. | Raw timing profiles are cross-compatible if mapped correctly inside the early `tiboot3.bin` initialization sequence. |</text:span></text:span></text:p>
      <text:p text:style-name="P89"><text:span text:style-name="Source_20_Text"><text:span text:style-name="T47">| **Power Management (PMIC)** | Dual TPS6594 Matrix (`TPS65941213` and `TPS65941111`) operating at I2C Slave Address **`0x48`** on the Wake-up Domain bus. | Dual TPS6594 Matrix (`TPS65941213` and `TPS65941111`) operating at I2C Slave Address **`0x48`** on the Wake-up Domain bus. | Handshake voltage-scaling registers match completely. **CRITICAL EXCLUSION:** Older Enterprise EVM profiles route PMICs to `0x60/0x61`, causing a power panic loop if selected. |</text:span></text:span></text:p>
      <text:p text:style-name="P89"><text:span text:style-name="Source_20_Text"><text:span text:style-name="T47">| **Board Tracking EEPROM** | Atmel 24C type non-volatile EEPROM mapped to I2C address **`0x50` / `0x51`** containing corporate structural parameter headers. | Custom board descriptor layout mapped to I2C space **`0x54` through `0x57`** matching legacy BeagleBone Cape guidelines. | **CRITICAL ARCHITECTURAL CONFLICT:** Forcing the TI SDK onto the BeagleBone causes a total driver hang during board identification. |</text:span></text:span></text:p>
      <text:p text:style-name="P89"><text:span text:style-name="Source_20_Text"><text:span text:style-name="T47">| **Primary Debug UART Output** | Routed to Main Domain Controller UART0 or UART2 (EVM variation dependent). | Routed directly to **`MAIN_UART0`** and exposed physically on the standard outer P9 Header pins. | **CRITICAL CONSOLE </text:span></text:span><text:soft-page-break/><text:span text:style-name="Source_20_Text"><text:span text:style-name="T47">CONFLICT:** Mismatched console indexes cause serial memory buffer leakage and infinite ghost character echo locks. |</text:span></text:span></text:p>
      <text:p text:style-name="P89"/>
      <text:p text:style-name="P89"><text:span text:style-name="Source_20_Text"><text:span text:style-name="T48">---</text:span></text:span></text:p>
      <text:p text:style-name="P89"/>
      <text:p text:style-name="P89"><text:span text:style-name="Source_20_Text"><text:span text:style-name="T48">## 2. Chronological Technical Log: Roadblocks, Root Causes, and Verification</text:span></text:span></text:p>
      <text:p text:style-name="P89"/>
      <text:p text:style-name="P89"><text:span text:style-name="Source_20_Text"><text:span text:style-name="T47">The bringing-up timeline evolved through five distinct system failure checkpoints. Each failure block had to be systematically analyzed, diagnosed via physical UART console output, and fixed before the processor could advance to the next execution stage.</text:span></text:span></text:p>
      <text:p text:style-name="P89"/>
      <text:p text:style-name="P89"><text:span text:style-name="Source_20_Text"><text:span text:style-name="T48">### Phase 2.1: The Security Layer Handshake Failure (OP-TEE Data Abort)</text:span></text:span></text:p>
      <text:p text:style-name="P89"><text:span text:style-name="Source_20_Text"><text:span text:style-name="T48">* </text:span></text:span><text:span text:style-name="Source_20_Text"><text:span text:style-name="T47">**Observed Symptom:** The initial execution loop abruptly terminated right as the Secondary Program Loader (SPL) attempted to scale architecture permissions. The terminal output emitted a cascading panic footprint:</text:span></text:span></text:p>
      <text:p text:style-name="P89"><text:span text:style-name="Source_20_Text"><text:span text:style-name="T47"><text:s text:c="2"/></text:span></text:span><text:span text:style-name="Source_20_Text"><text:span text:style-name="T49">```text</text:span></text:span></text:p>
      <text:p text:style-name="P89"><text:span text:style-name="Source_20_Text"><text:span text:style-name="T49"><text:s text:c="2"/>k3_sec_proxy_recv verification failed. ret = -65523</text:span></text:span></text:p>
      <text:p text:style-name="P89"><text:span text:style-name="Source_20_Text"><text:span text:style-name="T49"><text:s text:c="2"/>Queue is busy / Message receive failed</text:span></text:span></text:p>
      <text:p text:style-name="P89"><text:span text:style-name="Source_20_Text"><text:span text:style-name="T49"><text:s text:c="2"/>tee_otp_get_hw_unique_key failed</text:span></text:span></text:p>
      <text:p text:style-name="P89"><text:span text:style-name="Source_20_Text"><text:span text:style-name="T49"><text:s text:c="2"/>Core data-abort at address 0x14 (translation fault)</text:span></text:span></text:p>
      <text:p text:style-name="P89"><text:span text:style-name="Source_20_Text"><text:span text:style-name="T49"><text:s text:c="2"/>resetting ...</text:span></text:span></text:p>
      <text:p text:style-name="P88"><text:span text:style-name="Source_20_Text"><text:span text:style-name="T47"><text:s text:c="2"/>```</text:span></text:span></text:p>
      <text:p text:style-name="P89"><text:span text:style-name="Source_20_Text"><text:span text:style-name="T47">* **Root Cause Analysis:** On the TI K3 processor family, the primary 64-bit application cluster (A72) is explicitly sandboxed by hardware firewalls from directly writing to system configuration, clock trees, or power domains. All requests must be securely formatted and sent via a dedicated hardware mailbox called the **Secure Proxy Interface** to the isolated **Device Management &amp; Security Controller (DMSC)** core running the background System Firmware (SYSFW / TIFS). When compiling with generic out-of-tree community source blocks, these proxy mailboxes remained unmapped. OP-TEE attempted to query the hardware fuses for the Hardware Unique Key (</text:span></text:span><text:span text:style-name="Source_20_Text"><text:span text:style-name="T49">`HUK`</text:span></text:span><text:span text:style-name="Source_20_Text"><text:span text:style-name="T47">), hit a closed mailbox loop, experienced a timeout (</text:span></text:span><text:span text:style-name="Source_20_Text"><text:span text:style-name="T49">`ret = -65523`</text:span></text:span><text:span text:style-name="Source_20_Text"><text:span text:style-name="T47">), attempted to jump execution to a null pointer context at address </text:span></text:span><text:span text:style-name="Source_20_Text"><text:span text:style-name="T49">`0x14`</text:span></text:span><text:span text:style-name="Source_20_Text"><text:span text:style-name="T47">, and triggered a fatal hardware data abort.</text:span></text:span></text:p>
      <text:p text:style-name="P89"><text:span text:style-name="Source_20_Text"><text:span text:style-name="T48">* </text:span></text:span><text:span text:style-name="Source_20_Text"><text:span text:style-name="T47">**Engineering Solution:** </text:span></text:span></text:p>
      <text:p text:style-name="P89"><text:span text:style-name="Source_20_Text"><text:span text:style-name="T47"><text:s text:c="2"/></text:span></text:span><text:span text:style-name="Source_20_Text"><text:span text:style-name="T48">1. </text:span></text:span><text:span text:style-name="Source_20_Text"><text:span text:style-name="T47">Purged all intermediate community file links from the workstation workspace layout.</text:span></text:span></text:p>
      <text:p text:style-name="P89"><text:span text:style-name="Source_20_Text"><text:span text:style-name="T47"><text:s text:c="2"/>2. Anchored the toolchain environment variables directly to the production-tested prebuilt security firmware images included inside the local TI Linux Processor SDK tree: </text:span></text:span><text:span text:style-name="Source_20_Text"><text:span text:style-name="T49">`bl31.bin`</text:span></text:span><text:span text:style-name="Source_20_Text"><text:span text:style-name="T47"> (ARM Trusted Firmware) and </text:span></text:span><text:span text:style-name="Source_20_Text"><text:span text:style-name="T49">`bl32.bin`</text:span></text:span><text:span text:style-name="Source_20_Text"><text:span text:style-name="T47"> (OP-TEE distribution image).</text:span></text:span></text:p>
      <text:p text:style-name="P89"><text:span text:style-name="Source_20_Text"><text:span text:style-name="T47"><text:s text:c="2"/>3. Isolated a structural assembly bug inside the packaging framework: the </text:span></text:span><text:span text:style-name="Source_20_Text"><text:span text:style-name="T49">`binman`</text:span></text:span><text:span text:style-name="Source_20_Text"><text:span text:style-name="T47"> binary packager utility requires an explicit Device Manager (</text:span></text:span><text:span text:style-name="Source_20_Text"><text:span text:style-name="T49">`ti-dm`</text:span></text:span><text:span text:style-name="Source_20_Text"><text:span text:style-name="T47">) background controller task binary (</text:span></text:span><text:span text:style-name="Source_20_Text"><text:span text:style-name="T49">`ipc_echo_testb_mcu1_0_release_strip.xer5f`</text:span></text:span><text:span text:style-name="Source_20_Text"><text:span text:style-name="T47">) to spin up the System Controller Interface (TI-SCI) background messaging threads. The compilation script was updated to force-inject this missing link via an absolute environment variable path.</text:span></text:span></text:p>
      <text:p text:style-name="P89"/>
      <text:p text:style-name="P89"><text:span text:style-name="Source_20_Text"><text:span text:style-name="T48">### Phase 2.2: Storage Controller Initialization Driver Disconnect</text:span></text:span></text:p>
      <text:p text:style-name="P89"><text:span text:style-name="Source_20_Text"><text:span text:style-name="T47">* **Observed Symptom:** When executing a build configuration explicitly using the upstream BeagleBone configuration template file (</text:span></text:span><text:span text:style-name="Source_20_Text"><text:span text:style-name="T49">`j721e_beagleboneai64_a72_defconfig`</text:span></text:span><text:span text:style-name="Source_20_Text"><text:span text:style-name="T47">), the workspace compilation step crashed inside the terminal with a fatal structural compilation error:</text:span></text:span></text:p>
      <text:p text:style-name="P89"><text:span text:style-name="Source_20_Text"><text:span text:style-name="T47"><text:s text:c="2"/></text:span></text:span><text:span text:style-name="Source_20_Text"><text:span text:style-name="T49">```text</text:span></text:span></text:p>
      <text:p text:style-name="P89"><text:span text:style-name="Source_20_Text"><text:span text:style-name="T49"><text:s text:c="2"/>No rule to make target 'arch/arm/dts/k3-j721e-beaglebone-ai64.dtb', needed by 'dtbs'. Stop.</text:span></text:span></text:p>
      <text:p text:style-name="P89"><text:span text:style-name="Source_20_Text"><text:span text:style-name="T49"><text:s text:c="2"/>am654_sdhci : failed to get clock</text:span></text:span></text:p>
      <text:p text:style-name="P89"><text:span text:style-name="Source_20_Text"><text:span text:style-name="T49"><text:s text:c="2"/>spl: could not initialize mmc. error: -22</text:span></text:span></text:p>
      <text:p text:style-name="P89"><text:span text:style-name="Source_20_Text"><text:span text:style-name="T49"><text:s text:c="2"/>SPL: Unsupported Boot Device!</text:span></text:span></text:p>
      <text:p text:style-name="P88"><text:span text:style-name="Source_20_Text"><text:span text:style-name="T47"><text:s text:c="2"/>```</text:span></text:span></text:p>
      <text:p text:style-name="P89"><text:span text:style-name="Source_20_Text"><text:span text:style-name="T47">* **Root Cause Analysis:** The commercial TI Linux Processor SDK tree is highly optimized for enterprise reference kits and strips away community-maintained structural layouts, meaning the device tree source file </text:span></text:span><text:span text:style-name="Source_20_Text"><text:span text:style-name="T49">`k3-j721e-beaglebone-ai64.dts`</text:span></text:span><text:span text:style-name="Source_20_Text"><text:span text:style-name="T47"> was physically absent from the SDK's internal driver directory tree </text:span></text:span><text:soft-page-break/><text:span text:style-name="Source_20_Text"><text:span text:style-name="T47">(</text:span></text:span><text:span text:style-name="Source_20_Text"><text:span text:style-name="T49">`arch/arm/dts/`</text:span></text:span><text:span text:style-name="Source_20_Text"><text:span text:style-name="T47">). Because the target configuration profile demanded this non-existent file, </text:span></text:span><text:span text:style-name="Source_20_Text"><text:span text:style-name="T49">`binman`</text:span></text:span><text:span text:style-name="Source_20_Text"><text:span text:style-name="T47"> crashed. Attempting to force partial configurations caused the storage drivers to execute without valid system clock parent maps. The driver rejected the clock assignment step as an invalid parameter (Error </text:span></text:span><text:span text:style-name="Source_20_Text"><text:span text:style-name="T49">`-22`</text:span></text:span><text:span text:style-name="Source_20_Text"><text:span text:style-name="T47"> / </text:span></text:span><text:span text:style-name="Source_20_Text"><text:span text:style-name="T49">`EINVAL`</text:span></text:span><text:span text:style-name="Source_20_Text"><text:span text:style-name="T47">), meaning the </text:span></text:span><text:span text:style-name="Source_20_Text"><text:span text:style-name="T49">`tispl.bin`</text:span></text:span><text:span text:style-name="Source_20_Text"><text:span text:style-name="T47"> file was blocked from accessing the SD card controller (</text:span></text:span><text:span text:style-name="Source_20_Text"><text:span text:style-name="T49">`MMC2`</text:span></text:span><text:span text:style-name="Source_20_Text"><text:span text:style-name="T47">) to look for the final </text:span></text:span><text:span text:style-name="Source_20_Text"><text:span text:style-name="T49">`u-boot.img`</text:span></text:span><text:span text:style-name="Source_20_Text"><text:span text:style-name="T47"> package.</text:span></text:span></text:p>
      <text:p text:style-name="P89"><text:span text:style-name="Source_20_Text"><text:span text:style-name="T47">* **Engineering Solution:** The base compilation blueprint target was shifted to inherit properties from the built-in, native **</text:span></text:span><text:span text:style-name="Source_20_Text"><text:span text:style-name="T49">`j721e_evm_a72_defconfig`</text:span></text:span><text:span text:style-name="Source_20_Text"><text:span text:style-name="T47">** template structure. Because this configuration map is natively integrated into the SDK, it successfully generated the matching Device Tree Blobs (</text:span></text:span><text:span text:style-name="Source_20_Text"><text:span text:style-name="T49">`.dtb`</text:span></text:span><text:span text:style-name="Source_20_Text"><text:span text:style-name="T47">). Since our low-level tracking changes bypass the identity engine checks later, leveraging the EVM's system topology map allowed the storage interface drivers to locate the physical SD card controllers safely, initialize the execution channels, and pass boot states forward.</text:span></text:span></text:p>
      <text:p text:style-name="P89"/>
      <text:p text:style-name="P89"><text:span text:style-name="Source_20_Text"><text:span text:style-name="T48">### Phase 2.3: The Infinite Telemetry Command Parse Loop</text:span></text:span></text:p>
      <text:p text:style-name="P89"><text:span text:style-name="Source_20_Text"><text:span text:style-name="T48">* </text:span></text:span><text:span text:style-name="Source_20_Text"><text:span text:style-name="T47">**Observed Symptom:** The secondary bootloader phase successfully mounted the SD card interface, verified the binary packaging headers, and initialized the application memory matrix. However, immediately after printing the RAM density line, the terminal screen became trapped in an infinite scrolling text loop that ignored keyboard entries:</text:span></text:span></text:p>
      <text:p text:style-name="P89"><text:span text:style-name="Source_20_Text"><text:span text:style-name="T47"><text:s text:c="2"/></text:span></text:span><text:span text:style-name="Source_20_Text"><text:span text:style-name="T49">```text</text:span></text:span></text:p>
      <text:p text:style-name="P89"><text:span text:style-name="Source_20_Text"><text:span text:style-name="T49"><text:s text:c="2"/>DRAM: 2 GiB (total 4 GiB)</text:span></text:span></text:p>
      <text:p text:style-name="P89"><text:span text:style-name="Source_20_Text"><text:span text:style-name="T49"><text:s text:c="2"/>Core: 151 devices, 37 uclasses, devicetree: separate</text:span></text:span></text:p>
      <text:p text:style-name="P89"><text:span text:style-name="Source_20_Text"><text:span text:style-name="T49"><text:s text:c="2"/>Hit any key to stop autoboot: 0</text:span></text:span></text:p>
      <text:p text:style-name="P89"><text:span text:style-name="Source_20_Text"><text:span text:style-name="T49"><text:s text:c="2"/>Unknown command 'ore:' - try 'help'</text:span></text:span></text:p>
      <text:p text:style-name="P89"><text:span text:style-name="Source_20_Text"><text:span text:style-name="T49"><text:s text:c="2"/>-&gt; Flash: 0 2&gt; ore...</text:span></text:span></text:p>
      <text:p text:style-name="P89"><text:span text:style-name="Source_20_Text"><text:span text:style-name="T49"><text:s text:c="2"/>Unknown command 'ore:' - try 'help'</text:span></text:span></text:p>
      <text:p text:style-name="P88"><text:span text:style-name="Source_20_Text"><text:span text:style-name="T47"><text:s text:c="2"/>```</text:span></text:span></text:p>
      <text:p text:style-name="P89"><text:span text:style-name="Source_20_Text"><text:span text:style-name="T47">* **Root Cause Analysis:** Immediately following RAM allocation mapping, U-Boot triggers a foundational driver sweep loop (</text:span></text:span><text:span text:style-name="Source_20_Text"><text:span text:style-name="T49">`board_init_r`</text:span></text:span><text:span text:style-name="Source_20_Text"><text:span text:style-name="T47">) and writes an initialization message straight to the active serial interface block: </text:span></text:span><text:span text:style-name="Source_20_Text"><text:span text:style-name="T49">`Core: 151 devices, 37 uclasses, devicetree: separate`</text:span></text:span><text:span text:style-name="Source_20_Text"><text:span text:style-name="T47">. Because of pin assignment and multiplexing disparities between the EVM firmware configuration and the BeagleBone AI-64 physical trace layouts, the serial hardware subsystem experienced a severe data feedback leak. The serial input channel (</text:span></text:span><text:span text:style-name="Source_20_Text"><text:span text:style-name="T49">`stdin`</text:span></text:span><text:span text:style-name="Source_20_Text"><text:span text:style-name="T47">) read its own printed status text backward through the input buffer registers. It cut the trailing characters **</text:span></text:span><text:span text:style-name="Source_20_Text"><text:span text:style-name="T49">`ore:`</text:span></text:span><text:span text:style-name="Source_20_Text"><text:span text:style-name="T47">** out of the word </text:span></text:span><text:span text:style-name="Source_20_Text"><text:span text:style-name="T49">`Core:`</text:span></text:span><text:span text:style-name="Source_20_Text"><text:span text:style-name="T47">, mistook it for an active operator typing at a keyboard, and attempted to pass it to the internal command parser shell loop. This generated a non-terminating loop that completely locked down the console interface.</text:span></text:span></text:p>
      <text:p text:style-name="P89"><text:span text:style-name="Source_20_Text"><text:span text:style-name="T47">* **Engineering Solution:** The text-based master profile configuration template file (**</text:span></text:span><text:span text:style-name="Source_20_Text"><text:span text:style-name="T49">`configs/j721e_evm_a72_defconfig`</text:span></text:span><text:span text:style-name="Source_20_Text"><text:span text:style-name="T47">**) was modified to inject direct quiet flags. By setting </text:span></text:span><text:span text:style-name="Source_20_Text"><text:span text:style-name="T49">`CONFIG_SYS_CONSOLE_INFO_QUIET=y`</text:span></text:span><text:span text:style-name="Source_20_Text"><text:span text:style-name="T47">, the bootloader was instructed to suppress early verbose diagnostic system tracking text from ever printing to the terminal. By removing the string </text:span></text:span><text:span text:style-name="Source_20_Text"><text:span text:style-name="T49">`Core: 151 devices...`</text:span></text:span><text:span text:style-name="Source_20_Text"><text:span text:style-name="T47"> from the serial buffer entirely, the loop feedback vector was eliminated, stabilizing the console input line.</text:span></text:span></text:p>
      <text:p text:style-name="P89"/>
      <text:p text:style-name="P89"><text:span text:style-name="Source_20_Text"><text:span text:style-name="T48">### Phase 2.4: Corporate Identity Header Verification Crash</text:span></text:span></text:p>
      <text:p text:style-name="P89"><text:span text:style-name="Source_20_Text"><text:span text:style-name="T48">* </text:span></text:span><text:span text:style-name="Source_20_Text"><text:span text:style-name="T47">**Observed Symptom:** With the terminal loop silenced, the board initialized cleanly but experienced a total CPU freeze right before establishing the primary command line interface. The serial monitor output halted on a validation failure block:</text:span></text:span></text:p>
      <text:p text:style-name="P89"><text:span text:style-name="Source_20_Text"><text:span text:style-name="T47"><text:s text:c="2"/></text:span></text:span><text:span text:style-name="Source_20_Text"><text:span text:style-name="T49">```text</text:span></text:span></text:p>
      <text:p text:style-name="P89"><text:span text:style-name="Source_20_Text"><text:span text:style-name="T49"><text:s text:c="2"/>Unidentified board... claims BBONEAI-64-B0- in eeprom header</text:span></text:span></text:p>
      <text:p text:style-name="P89"><text:span text:style-name="Source_20_Text"><text:span text:style-name="T49"><text:s text:c="2"/>[System Halts Indefinitely]</text:span></text:span></text:p>
      <text:p text:style-name="P87"><text:span text:style-name="Source_20_Text"><text:span text:style-name="T47"><text:s text:c="2"/>```</text:span></text:span></text:p>
      <text:list xml:id="list3364069361" text:style-name="L15">
        <text:list-item>
          <text:p text:style-name="P129"><text:span text:style-name="T13">Root Cause Analysis:</text:span> The enterprise TI Processor SDK contains highly rigid validation algorithms designed to guard corporate hardware platforms. Right before setting up the user space environment parameters, U-Boot executes an identification macro loop that scans the <text:soft-page-break/>on-board non-volatile EEPROM over the I2C bus at addresses <text:span text:style-name="Source_20_Text"><text:span text:style-name="T46">0x50/0x51</text:span></text:span> to read layout descriptors, serial keys, and version arrays. When executed on the BeagleBone AI-64, the verification function instead reads the community descriptor footprint <text:span text:style-name="Source_20_Text"><text:span text:style-name="T46">BBONEAI-64-B0-</text:span></text:span>. Because this custom layout string does not map to any expected TI corporate inventory profiles, the driver script hits an unhandled verification mismatch condition, fails to gracefully exit, enters an infinite wait state, and completely freezes the application core.</text:p>
        </text:list-item>
        <text:list-item>
          <text:p text:style-name="P130"><text:span text:style-name="T13">Engineering Solution:</text:span> The low-level C validation engine library source code was patched to force an absolute, early bypass step.</text:p>
          <text:list>
            <text:list-item>
              <text:p text:style-name="P129"><text:span text:style-name="T13">Target File Path:</text:span> <text:span text:style-name="Source_20_Text"><text:span text:style-name="T46">board/ti/common/board_detect.c</text:span></text:span></text:p>
            </text:list-item>
            <text:list-item>
              <text:p text:style-name="P129"><text:span text:style-name="T13">Target Function Signature:</text:span> <text:span text:style-name="Source_20_Text"><text:span text:style-name="T46">int __maybe_unused ti_i2c_eeprom_am6_get(char *header, int size)</text:span></text:span></text:p>
            </text:list-item>
            <text:list-item>
              <text:p text:style-name="P131"><text:span text:style-name="T13">Modifications Applied:</text:span> Injected a hardcoded successful status override statement (<text:span text:style-name="Source_20_Text"><text:span text:style-name="T46">return 0;</text:span></text:span>) directly into the opening execution line of the function block. This neutralized the validation checking loop completely, forcing the bootloader to treat the BeagleBone identity block as verified without scanning the mismatched I2C fields.</text:p>
            </text:list-item>
          </text:list>
        </text:list-item>
      </text:list>
      <text:h text:style-name="P24" text:outline-level="2">Phase 2.5: Automated Script Filename String Mismatch</text:h>
      <text:list xml:id="list2221536132" text:style-name="L16">
        <text:list-item>
          <text:p text:style-name="P132"><text:span text:style-name="T13">Observed Symptom:</text:span> The entire multi-stage boot sequence executed cleanly and dropped into a fully working, stable U-Boot command prompt. However, when left to run automatically, the automated script engine threw a terminal mount error and stopped:<text:line-break/><text:span text:style-name="Source_20_Text"><text:span text:style-name="T46">text Failed to load '/boot/dtb/ti/k3-j721e-beagleboneai64.dtb' U-Boot =&gt; </text:span></text:span></text:p>
        </text:list-item>
        <text:list-item>
          <text:p text:style-name="P132"><text:span text:style-name="T13">Root Cause Analysis:</text:span> The generic autoboot automation script embedded inside the compiled binary is hardcoded to parse the board model name and fetch its corresponding device tree file to load the Linux kernel. The script generated an un-hyphenated string parameter target: <text:span text:style-name="Source_20_Text"><text:span text:style-name="T46">beagleboneai64.dtb</text:span></text:span>. However, on standard BeagleBone AI-64 Debian or TI distribution SD cards, the physical file is written to disk with traditional hyphen separation parameters: <text:span text:style-name="Source_20_Text"><text:span text:style-name="T46">k3-j721e-beaglebone-ai64.dtb</text:span></text:span>. Because the file names did not match, the bootloader could not locate the platform map and stopped at the shell prompt.</text:p>
        </text:list-item>
        <text:list-item>
          <text:p text:style-name="P133"><text:span text:style-name="T13">Engineering Solution:</text:span> Manual memory address allocations were issued straight into the live terminal prompt (<text:span text:style-name="Source_20_Text"><text:span text:style-name="T46">=&gt;</text:span></text:span>) to override the script bug, mount the target filesystem partitions manually, link the correct file path strings, and jump execution control directly over to the underlying Linux subsystem.</text:p>
        </text:list-item>
      </text:list>
      <text:p text:style-name="Horizontal_20_Line"/>
      <text:h text:style-name="P24" text:outline-level="2">3. Step-by-Step Code Modifications Code Repository</text:h>
      <text:p text:style-name="P95">Below are the exact code transformations implemented across the U-Boot source tree workspace on the workstation.</text:p>
      <text:h text:style-name="P24" text:outline-level="2"><text:soft-page-break/>3.1 The Board Identification Bypass Patch</text:h>
      <text:p text:style-name="P93"><text:span text:style-name="T44">Open the file </text:span><text:span text:style-name="Source_20_Text"><text:span text:style-name="T16">board/ti/common/board_detect.c</text:span></text:span><text:span text:style-name="T44"> in a text editor and update the primary configuration function to match this layout exactly:</text:span></text:p>
      <text:p text:style-name="P95">```c<text:line-break/>/* --- Code Location: board/ti/common/board_detect.c --- */</text:p>
      <text:p text:style-name="P94"><text:span text:style-name="T44">int __maybe_unused ti_i2c_eeprom_am6_get(char </text:span><text:span text:style-name="Emphasis"><text:span text:style-name="T51">header, int size)<text:line-break/>{<text:line-break/>/</text:span></text:span><text:span text:style-name="T44"> ENGINEERING OVERRIDE: Bypass corporate EEPROM identity checks </text:span><text:span text:style-name="Emphasis"><text:span text:style-name="T51">/<text:line-break/>/</text:span></text:span><text:span text:style-name="T44"> Prevents total CPU freeze when running on BeagleBone AI-64 hardware */<text:line-break/>return 0;</text:span></text:p>
      <text:p text:style-name="P95">/* The remaining legacy verification routines below are completely ignored by the compiler */<text:line-break/>struct ti_am6_eeprom *am6_eeprom;<text:line-break/>struct ti_i2c_eeprom_header eeprom_header;<text:line-break/>int ret;</text:p>
      <text:p text:style-name="P95">ret = ti_i2c_eeprom_get_header(&amp;eeprom_header, TI_EEPROM_BUS_NUM, TI_EEPROM_DEV_ADDR);<text:line-break/>if (ret) {<text:line-break/>pr_err("EEPROM header read failed\n");<text:line-break/>return ret;<text:line-break/>}<text:line-break/>/* ... rest of original source code remains untouched ... */<text:line-break/>}<text:line-break/>```</text:p>
      <text:h text:style-name="P24" text:outline-level="2">3.2 The Serial Console Quiet and Mux Isolation Patch</text:h>
      <text:p text:style-name="P93"><text:span text:style-name="T44">Open the master configuration text template file </text:span><text:span text:style-name="Source_20_Text"><text:span text:style-name="T16">configs/j721e_evm_a72_defconfig</text:span></text:span><text:span text:style-name="T44"> and navigate to the very bottom of the file. Paste these lines exactly to permanently strip out the character feedback leak:</text:span></text:p>
      <text:p text:style-name="P95">```text</text:p>
      <text:h text:style-name="P24" text:outline-level="2"><text:soft-page-break/>--- Code Location: configs/j721e_evm_a72_defconfig ---</text:h>
      <text:h text:style-name="P24" text:outline-level="2">Append to the bottom of the file to fix infinite 'ore:' input loop:</text:h>
      <text:p text:style-name="P95">CONFIG_ENV_IS_NOWHERE=y</text:p>
      <text:h text:style-name="P24" text:outline-level="2">CONFIG_ENV_IS_IN_MMC is not set</text:h>
      <text:h text:style-name="P24" text:outline-level="2">CONFIG_ENV_IS_IN_FAT is not set</text:h>
      <text:p text:style-name="P95">CONFIG_CONSOLE_MUX=n<text:line-break/>CONFIG_SYS_CONSOLE_INFO_QUIET=y<text:line-break/>```</text:p>
      <text:p text:style-name="Horizontal_20_Line"/>
      <text:h text:style-name="P24" text:outline-level="2">4. Workstation Build Environment &amp; Compilation Sequence</text:h>
      <text:p text:style-name="P95">Follow this exact terminal execution tree on your development workstation to rebuild the customized bootloader files cleanly.</text:p>
      <text:h text:style-name="P24" text:outline-level="2">Step 4.1: Erase Previous Build Cache and Target Objects</text:h>
      <text:p text:style-name="P93"><text:span text:style-name="T44">Completely purge any stale configuration variables, dependencies, or intermediate folder references across the source repository:<text:line-break/></text:span><text:span text:style-name="Source_20_Text"><text:span text:style-name="T45">bash make ARCH=arm mrproper rm -rf a72/ spl/ tpl/ </text:span></text:span></text:p>
      <text:h text:style-name="P24" text:outline-level="2">Step 4.2: Load the Production Configuration Template</text:h>
      <text:p text:style-name="P93"><text:span text:style-name="T44">Initialize the master tracking profile using the production-integrated platform target config file:<text:line-break/></text:span><text:span text:style-name="Source_20_Text"><text:span text:style-name="T45">bash make ARCH=arm j721e_evm_a72_defconfig </text:span></text:span></text:p>
      <text:h text:style-name="P24" text:outline-level="2">Step 4.3: Execute the Toolchain Compilation Command</text:h>
      <text:p text:style-name="P95">Run the primary compilation command. Ensure the environment variables point directly to the absolute directory paths where your local <text:span text:style-name="T13">TI Linux Processor SDK prebuilt image assets</text:span> live on your workstation machine:</text:p>
      <text:p text:style-name="P93"><text:span text:style-name="Source_20_Text"><text:span text:style-name="T45">bash make ARCH=arm CROSS_COMPILE=aarch64-linux-gnu- \ BL31=/home/intern/Downloads/evm_sdk_installer/board-support/prebuilt-images/bl31.bin \ </text:span></text:span><text:soft-page-break/><text:span text:style-name="Source_20_Text"><text:span text:style-name="T45">TEE=/home/intern/Downloads/evm_sdk_installer/board-support/prebuilt-images/bl32.bin \ BINMAN_INDIRS=/home/intern/Downloads/evm_sdk_installer/board-support/prebuilt-images/ </text:span></text:span></text:p>
      <text:p text:style-name="Horizontal_20_Line"/>
      <text:h text:style-name="P24" text:outline-level="2">5. Storage Media Mapping &amp; File Deployment Blueprints</text:h>
      <text:p text:style-name="P93"><text:span text:style-name="T44">Because the compilation profile targets a </text:span><text:span text:style-name="T13">General Purpose (GP)</text:span><text:span text:style-name="T44"> processor, the build system generates unsigned binaries carrying an extension suffix (</text:span><text:span text:style-name="Source_20_Text"><text:span text:style-name="T45">_unsigned</text:span></text:span><text:span text:style-name="T44">).</text:span></text:p>
      <text:p text:style-name="P95">Before deploying the files to the FAT32 boot partition of your micro-SD card, you must rename them to match the hardcoded strings that the TDA4VM SoC's bootROM looks for during initial startup.</text:p>
      <text:h text:style-name="P24" text:outline-level="2">5.1 SD Card Boot Partition File Tree Layout</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2">Source Workspace Binary Asset</text:p>
          </table:table-cell>
          <table:table-cell table:style-name="Table3.A1" office:value-type="string">
            <text:p text:style-name="P92">Required Destination Target Filename</text:p>
          </table:table-cell>
          <table:table-cell table:style-name="Table3.A1" office:value-type="string">
            <text:p text:style-name="P92">Host File Allocation Table Target Location</text:p>
          </table:table-cell>
          <table:table-cell table:style-name="Table3.A1" office:value-type="string">
            <text:p text:style-name="P92">Primary Functional Responsibility inside Boot Pipeline</text:p>
          </table:table-cell>
        </table:table-row>
        <table:table-row>
          <table:table-cell table:style-name="Table3.A1" office:value-type="string">
            <text:p text:style-name="P90">Prebuilt / Custom compiled inside your <text:span text:style-name="T13">R5</text:span> Build Directory</text:p>
          </table:table-cell>
          <table:table-cell table:style-name="Table3.A1" office:value-type="string">
            <text:p text:style-name="P91"><text:span text:style-name="Source_20_Text"><text:span text:style-name="T16">tiboot3.bin</text:span></text:span></text:p>
          </table:table-cell>
          <table:table-cell table:style-name="Table3.A1" office:value-type="string">
            <text:p text:style-name="P91"><text:span text:style-name="Source_20_Text"><text:span text:style-name="T46">/boot/</text:span></text:span> (FAT32 Boot Sector Partition 1)</text:p>
          </table:table-cell>
          <table:table-cell table:style-name="Table3.A1" office:value-type="string">
            <text:p text:style-name="P90">Fires up on the 32-bit MCU core. Initializes LPDDR4 timings, sets system clocks, and scales PMIC voltages.</text:p>
          </table:table-cell>
        </table:table-row>
        <table:table-row>
          <table:table-cell table:style-name="Table3.A1" office:value-type="string">
            <text:p text:style-name="P91">Root Path Binaries: <text:span text:style-name="Source_20_Text"><text:span text:style-name="T46">/tispl.bin_unsigned</text:span></text:span></text:p>
          </table:table-cell>
          <table:table-cell table:style-name="Table3.A1" office:value-type="string">
            <text:p text:style-name="P91"><text:span text:style-name="Source_20_Text"><text:span text:style-name="T16">tispl.bin</text:span></text:span></text:p>
          </table:table-cell>
          <table:table-cell table:style-name="Table3.A1" office:value-type="string">
            <text:p text:style-name="P91"><text:span text:style-name="Source_20_Text"><text:span text:style-name="T46">/boot/</text:span></text:span> (FAT32 Boot Sector Partition 1)</text:p>
          </table:table-cell>
          <table:table-cell table:style-name="Table3.A1" office:value-type="string">
            <text:p text:style-name="P90">Switches architecture states to 64-bit mode, initializes ARM Trusted Firmware (BL31), and hooks secure OP-TEE layers.</text:p>
          </table:table-cell>
        </table:table-row>
        <table:table-row>
          <table:table-cell table:style-name="Table3.A1" office:value-type="string">
            <text:p text:style-name="P91">Root Path Binaries: <text:span text:style-name="Source_20_Text"><text:span text:style-name="T46">/u-boot.img_unsigned</text:span></text:span></text:p>
          </table:table-cell>
          <table:table-cell table:style-name="Table3.A1" office:value-type="string">
            <text:p text:style-name="P91"><text:span text:style-name="Source_20_Text"><text:span text:style-name="T16">u-boot.img</text:span></text:span></text:p>
          </table:table-cell>
          <table:table-cell table:style-name="Table3.A1" office:value-type="string">
            <text:p text:style-name="P91"><text:span text:style-name="Source_20_Text"><text:span text:style-name="T46">/boot/</text:span></text:span> (FAT32 Boot Sector Partition 1)</text:p>
          </table:table-cell>
          <table:table-cell table:style-name="Table3.A1" office:value-type="string">
            <text:p text:style-name="P90">Launches the interactive terminal shell console layout, reads external configurations, and loads the Linux kernel.</text:p>
          </table:table-cell>
        </table:table-row>
      </table:table>
      <text:p text:style-name="Horizontal_20_Line"/>
      <text:h text:style-name="P24" text:outline-level="2">6. Live Verification &amp; Manual Linux Execution Matrix</text:h>
      <text:p text:style-name="P93"><text:span text:style-name="T44">When the modified micro-SD card is inserted into the BeagleBone AI-64 and power is applied, the initial serial console buffer freeze will clear. The terminal log will print system descriptions smoothly and present a fully working, responsive prompt interface (</text:span><text:span text:style-name="Source_20_Text"><text:span text:style-name="T45">=&gt;</text:span></text:span><text:span text:style-name="T44">).</text:span></text:p>
      <text:p text:style-name="P95"><text:soft-page-break/>To step directly past the automated script filename filename error and immediately launch your operating system, copy and execute these lines one-by-one into your terminal monitor:</text:p>
      <text:p text:style-name="P93"><text:span text:style-name="Source_20_Text"><text:span text:style-name="T45">text =&gt; setenv bootargs console=ttyS2,115200n8 root=/dev/mmcblk1p2 ro rootwait =&gt; ext4load mmc 1:2 0x80080000 /boot/Image =&gt; ext4load mmc 1:2 0x82000000 /boot/dtb/ti/k3-j721e-beaglebone-ai64.dtb =&gt; booti 0x80080000 - 0x82000000 </text:span></text:span></text:p>
      <text:h text:style-name="P24" text:outline-level="2">6.1 Address Allocation and Argument Specifications:</text:h>
      <text:list xml:id="list3955647944" text:style-name="L17">
        <text:list-item>
          <text:p text:style-name="P134"><text:span text:style-name="Source_20_Text"><text:span text:style-name="T16">setenv bootargs ...</text:span></text:span>: Establishes the runtime properties passed straight to the Linux kernel. It anchors the primary debug shell line to the physical BeagleBone P9 UART header pins (<text:span text:style-name="Source_20_Text"><text:span text:style-name="T16">ttyS2</text:span></text:span>), sets the communication speed to <text:span text:style-name="T13">115200 baud</text:span>, and sets the second data partition of the card (<text:span text:style-name="Source_20_Text"><text:span text:style-name="T46">/dev/mmcblk1p2</text:span></text:span>) as the active root file system location.</text:p>
        </text:list-item>
        <text:list-item>
          <text:p text:style-name="P134"><text:span text:style-name="Source_20_Text"><text:span text:style-name="T16">0x80080000</text:span></text:span>: The direct 32-bit aligned destination execution memory address space in the DDR RAM matrix allocated to hold the uncompressed Linux Kernel execution image binary (<text:span text:style-name="Source_20_Text"><text:span text:style-name="T46">Image</text:span></text:span>).</text:p>
        </text:list-item>
        <text:list-item>
          <text:p text:style-name="P134"><text:span text:style-name="Source_20_Text"><text:span text:style-name="T16">0x82000000</text:span></text:span>: The distinct destination storage memory block in RAM allocated to house the corrected, hyphen-separated physical hardware system map descriptor file (<text:span text:style-name="Source_20_Text"><text:span text:style-name="T16">k3-j721e-beaglebone-ai64.dtb</text:span></text:span>).</text:p>
        </text:list-item>
        <text:list-item>
          <text:p text:style-name="P135"><text:span text:style-name="Source_20_Text"><text:span text:style-name="T16">booti</text:span></text:span>: The execution directive that commands the ARM Cortex-A72 application cores to immediately execute the kernel image located at the first memory pointer address while referencing the hardware profile map located at the second pointer block.</text:p>
        </text:list-item>
      </text:list>
      <text:p text:style-name="Horizontal_20_Line"/>
      <text:h text:style-name="P24" text:outline-level="2">7. Post-Boot Optimization: Permanent Boot Process Automation</text:h>
      <text:p text:style-name="P93"><text:span text:style-name="T44">Once the manual execution command tree passes control to the Linux kernel, the system will execute its init processes and safely launch the user space login prompt (</text:span><text:span text:style-name="Source_20_Text"><text:span text:style-name="T45">j721e-evm login:</text:span></text:span><text:span text:style-name="T44">).</text:span></text:p>
      <text:p text:style-name="P95">To ensure the system boots completely hands-free on every subsequent power cycle without requiring you to manually type commands at the prompt, log into your root account and create a persistent environment script override file on your storage partition.</text:p>
      <text:h text:style-name="P24" text:outline-level="2">Step 7.1: Access the Root Workspace File Editor</text:h>
      <text:p text:style-name="P95">Log into the prompt using the default system credentials and open an environment template script file inside the main boot partition path:</text:p>
      <text:list xml:id="list135373128" text:style-name="L18">
        <text:list-item>
          <text:p text:style-name="P137"><text:soft-page-break/><text:span text:style-name="T13">Username:</text:span> <text:span text:style-name="Source_20_Text"><text:span text:style-name="T46">root</text:span></text:span></text:p>
        </text:list-item>
        <text:list-item>
          <text:p text:style-name="P136"><text:span text:style-name="T13">Password:</text:span> <text:span text:style-name="Emphasis"><text:span text:style-name="T50">(Leave completely blank and press Enter)</text:span></text:span></text:p>
        </text:list-item>
      </text:list>
      <text:p text:style-name="P93"><text:span text:style-name="Source_20_Text"><text:span text:style-name="T45">bash mkdir -p /boot nano /boot/uEnv.txt </text:span></text:span></text:p>
      <text:h text:style-name="P24" text:outline-level="2">Step 7.2: Inject the Complete Automation Command Values</text:h>
      <text:p text:style-name="P93"><text:span text:style-name="T44">Paste the text configuration blocks exactly as formatted below. Ensure that the complete </text:span><text:span text:style-name="Source_20_Text"><text:span text:style-name="T45">uenvcmd</text:span></text:span><text:span text:style-name="T44"> statement line remains on a single, continuous line with no hidden word-wrapping or carriage returns:</text:span></text:p>
      <text:p text:style-name="P93"><text:span text:style-name="Source_20_Text"><text:span text:style-name="T45">text bootargs=console=ttyS2,115200n8 root=/dev/mmcblk1p2 ro rootwait uenvcmd=ext4load mmc 1:2 0x80080000 /boot/Image; ext4load mmc 1:2 0x82000000 /boot/dtb/ti/k3-j721e-beaglebone-ai64.dtb; booti 0x80080000 - 0x82000000 </text:span></text:span></text:p>
      <text:h text:style-name="P24" text:outline-level="2">Step 7.3: Save and Verify</text:h>
      <text:list xml:id="list2017667118" text:style-name="L19">
        <text:list-item>
          <text:p text:style-name="P138">Commit the changes to your SD card partition storage sector by pressing <text:span text:style-name="Source_20_Text"><text:span text:style-name="T16">Ctrl + O</text:span></text:span>, then hitting <text:span text:style-name="Source_20_Text"><text:span text:style-name="T16">Enter</text:span></text:span> to accept the file target bounds.</text:p>
        </text:list-item>
        <text:list-item>
          <text:p text:style-name="P139">Exit the terminal text editor interface by pressing <text:span text:style-name="Source_20_Text"><text:span text:style-name="T16">Ctrl + X</text:span></text:span>.</text:p>
        </text:list-item>
      </text:list>
      <text:p text:style-name="P93"><text:span text:style-name="T44">The setup is complete. You can now power cycle your hardware. U-Boot will automatically capture the instructions inside </text:span><text:span text:style-name="Source_20_Text"><text:span text:style-name="T45">uEnv.txt</text:span></text:span><text:span text:style-name="T44"> during startup, skip the shell prompt timeout, and load straight into your Linux desktop or terminal interface automatically!</text:span></text:p>
      <text:p text:style-name="P89"><text:span text:style-name="Source_20_Text"><text:span text:style-name="T47">***</text:span></text:span></text:p>
      <text:p text:style-name="P89"/>
      <text:p text:style-name="P89"><text:span text:style-name="Source_20_Text"><text:span text:style-name="T47">This technical specification documentation contains the full history and engineering logs of your porting workflow. You can refer to it at any time to recreate your custom U-Boot configurations from scratch. </text:span></text:span></text:p>
      <text:p text:style-name="P89"/>
      <text:p text:style-name="P12"><text:span text:style-name="Source_20_Text"><text:span text:style-name="T47">If you begin testing applications and need help tracking down pin maps for the **PRU real-time cores**, configuring **C7x DSP hardware acceleration libraries**, or routing specialized **CSI-2 camera inputs** via the device tree, let me know!</text:span></text:span></text:p>
      <text:p text:style-name="P66"/>
      <text:p text:style-name="P8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8T15:20:05.169683748</meta:creation-date>
    <dc:date>2026-07-18T10:04:33.318697613</dc:date>
    <meta:editing-duration>PT18H44M30S</meta:editing-duration>
    <meta:editing-cycles>63</meta:editing-cycles>
    <meta:generator>LibreOffice/7.3.7.2$Linux_X86_64 LibreOffice_project/30$Build-2</meta:generator>
    <meta:document-statistic meta:table-count="3" meta:image-count="1" meta:object-count="0" meta:page-count="29" meta:paragraph-count="727" meta:word-count="6546" meta:character-count="49555" meta:non-whitespace-character-count="42717"/>
  </office:meta>
</office:document-meta>
</file>